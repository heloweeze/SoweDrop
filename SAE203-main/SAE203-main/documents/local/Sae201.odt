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3727C742EB7.png" manifest:media-type="image/png"/>
  <manifest:file-entry manifest:full-path="Pictures/100000000000039E000002DCF5F67489.png" manifest:media-type="image/png"/>
  <manifest:file-entry manifest:full-path="Pictures/100000000000028800000074932F1621.png" manifest:media-type="image/png"/>
  <manifest:file-entry manifest:full-path="Pictures/100000000000039A0000007B56815137.png" manifest:media-type="image/png"/>
  <manifest:file-entry manifest:full-path="Pictures/10000000000002F80000037478D426F9.png" manifest:media-type="image/png"/>
  <manifest:file-entry manifest:full-path="Pictures/10000000000002880000006A8217FFF1.png" manifest:media-type="image/png"/>
  <manifest:file-entry manifest:full-path="Pictures/10000000000003460000033F50F14426.png" manifest:media-type="image/png"/>
  <manifest:file-entry manifest:full-path="Pictures/10000000000002ED00000241141E3CDA.png" manifest:media-type="image/png"/>
  <manifest:file-entry manifest:full-path="Pictures/10000000000002FD0000009A8DA7FD13.png" manifest:media-type="image/png"/>
  <manifest:file-entry manifest:full-path="Pictures/100000000000034C0000011C74A84D84.png" manifest:media-type="image/png"/>
  <manifest:file-entry manifest:full-path="Pictures/1000000000000350000000BDACD77B53.png" manifest:media-type="image/png"/>
  <manifest:file-entry manifest:full-path="Pictures/1000000000000278000000AF22239B94.png" manifest:media-type="image/png"/>
  <manifest:file-entry manifest:full-path="Pictures/100000000000022D000000E32102C6A9.png" manifest:media-type="image/png"/>
  <manifest:file-entry manifest:full-path="Pictures/100000000000025E000000F327A59D1B.png" manifest:media-type="image/png"/>
  <manifest:file-entry manifest:full-path="Pictures/100000000000028600000158DA67214D.png" manifest:media-type="image/png"/>
  <manifest:file-entry manifest:full-path="Pictures/10000000000003820000023A98273F19.png" manifest:media-type="image/png"/>
  <manifest:file-entry manifest:full-path="Pictures/1000000000000231000000E4A5C620A7.png" manifest:media-type="image/png"/>
  <manifest:file-entry manifest:full-path="Pictures/10000000000003530000020600A5D290.png" manifest:media-type="image/png"/>
  <manifest:file-entry manifest:full-path="Pictures/10000000000002370000010735D9F913.png" manifest:media-type="image/png"/>
  <manifest:file-entry manifest:full-path="Pictures/100000000000022600000058694F3D69.png" manifest:media-type="image/png"/>
  <manifest:file-entry manifest:full-path="Pictures/100000000000028A00000188332A0993.png" manifest:media-type="image/png"/>
  <manifest:file-entry manifest:full-path="Pictures/10000000000001F90000018A96CFBAFF.png" manifest:media-type="image/png"/>
  <manifest:file-entry manifest:full-path="Pictures/100000000000031F00000224BBF7F085.png" manifest:media-type="image/png"/>
  <manifest:file-entry manifest:full-path="Pictures/100000000000036C000001377CC1E1D4.png" manifest:media-type="image/png"/>
  <manifest:file-entry manifest:full-path="Pictures/100000000000028E0000015FBF4B2304.png" manifest:media-type="image/png"/>
  <manifest:file-entry manifest:full-path="Pictures/100000000000034D000001F1C694AA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5.482cm" table:align="left"/>
    </style:style>
    <style:style style:name="Tableau1.A" style:family="table-column">
      <style:table-column-properties style:column-width="3.642cm"/>
    </style:style>
    <style:style style:name="Tableau1.B" style:family="table-column">
      <style:table-column-properties style:column-width="1.386cm"/>
    </style:style>
    <style:style style:name="Tableau1.C" style:family="table-column">
      <style:table-column-properties style:column-width="2.528cm"/>
    </style:style>
    <style:style style:name="Tableau1.D" style:family="table-column">
      <style:table-column-properties style:column-width="1.967cm"/>
    </style:style>
    <style:style style:name="Tableau1.E" style:family="table-column">
      <style:table-column-properties style:column-width="5.958cm"/>
    </style:style>
    <style:style style:name="Tableau1.A1" style:family="table-cell">
      <style:table-cell-properties style:vertical-align="middle" fo:padding="0.049cm" fo:border="none"/>
    </style:style>
    <style:style style:name="Tableau2" style:family="table">
      <style:table-properties style:width="13.492cm" table:align="left"/>
    </style:style>
    <style:style style:name="Tableau2.A" style:family="table-column">
      <style:table-column-properties style:column-width="2.425cm"/>
    </style:style>
    <style:style style:name="Tableau2.B" style:family="table-column">
      <style:table-column-properties style:column-width="3.971cm"/>
    </style:style>
    <style:style style:name="Tableau2.C" style:family="table-column">
      <style:table-column-properties style:column-width="7.096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7.054cm"/>
    </style:style>
    <style:style style:name="Tableau3.B" style:family="table-column">
      <style:table-column-properties style:column-width="1.887cm"/>
    </style:style>
    <style:style style:name="Tableau3.C" style:family="table-column">
      <style:table-column-properties style:column-width="2.141cm"/>
    </style:style>
    <style:style style:name="Tableau3.D" style:family="table-column">
      <style:table-column-properties style:column-width="5.918cm"/>
    </style:style>
    <style:style style:name="Tableau3.A1" style:family="table-cell">
      <style:table-cell-properties style:vertical-align="middle" fo:padding="0.049cm" fo:border="none"/>
    </style:style>
    <style:style style:name="Tableau4" style:family="table">
      <style:table-properties style:width="6.608cm" table:align="left"/>
    </style:style>
    <style:style style:name="Tableau4.A" style:family="table-column">
      <style:table-column-properties style:column-width="1.919cm"/>
    </style:style>
    <style:style style:name="Tableau4.B" style:family="table-column">
      <style:table-column-properties style:column-width="4.688cm"/>
    </style:style>
    <style:style style:name="Tableau4.A1" style:family="table-cell">
      <style:table-cell-properties style:vertical-align="middle" fo:padding="0.049cm" fo:border="none"/>
    </style:style>
    <style:style style:name="P1" style:family="paragraph" style:parent-style-name="Standard">
      <style:text-properties officeooo:rsid="00146cba" officeooo:paragraph-rsid="00146cba"/>
    </style:style>
    <style:style style:name="P2" style:family="paragraph" style:parent-style-name="Standard">
      <style:text-properties officeooo:rsid="00169e0d" officeooo:paragraph-rsid="00169e0d"/>
    </style:style>
    <style:style style:name="P3" style:family="paragraph" style:parent-style-name="Standard">
      <style:text-properties officeooo:rsid="00169e0d" officeooo:paragraph-rsid="00184895"/>
    </style:style>
    <style:style style:name="P4" style:family="paragraph" style:parent-style-name="Standard">
      <style:text-properties officeooo:rsid="00169e0d" officeooo:paragraph-rsid="0019f868"/>
    </style:style>
    <style:style style:name="P5" style:family="paragraph" style:parent-style-name="Standard">
      <style:text-properties officeooo:rsid="00169e0d" officeooo:paragraph-rsid="001c2a0f"/>
    </style:style>
    <style:style style:name="P6" style:family="paragraph" style:parent-style-name="Standard">
      <style:text-properties officeooo:rsid="0019f868" officeooo:paragraph-rsid="0019f868"/>
    </style:style>
    <style:style style:name="P7"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language="zxx" fo:country="none" fo:font-style="normal" style:text-underline-style="none" fo:font-weight="normal" officeooo:rsid="00169e0d" officeooo:paragraph-rsid="001c2a0f" fo:background-color="transparent"/>
    </style:style>
    <style:style style:name="P8"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language="zxx" fo:country="none" fo:font-style="normal" style:text-underline-style="none" fo:font-weight="normal" officeooo:rsid="00205c49" officeooo:paragraph-rsid="00205c49" fo:background-color="transparent"/>
    </style:style>
    <style:style style:name="P9" style:family="paragraph" style:parent-style-name="Standard">
      <loext:graphic-properties draw:fill="solid" draw:fill-color="#282a36" draw:opacity="100%"/>
      <style:paragraph-properties fo:background-color="#282a36"/>
      <style:text-properties style:use-window-font-color="true" loext:opacity="0%" fo:language="zxx" fo:country="none" fo:font-style="normal" style:text-underline-style="none" fo:font-weight="normal" officeooo:rsid="0021fe1e" officeooo:paragraph-rsid="00332c36" fo:background-color="transparent"/>
    </style:style>
    <style:style style:name="P10"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language="zxx" fo:country="none" fo:font-style="normal" style:text-underline-style="none" fo:font-weight="normal" officeooo:rsid="0021fe1e" officeooo:paragraph-rsid="0021fe1e" fo:background-color="transparent"/>
    </style:style>
    <style:style style:name="P11"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19f868" officeooo:paragraph-rsid="0019f868" fo:background-color="transparent" style:font-size-asian="10pt" style:font-size-complex="10pt"/>
    </style:style>
    <style:style style:name="P12"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169e0d" officeooo:paragraph-rsid="00184895" fo:background-color="transparent" style:font-size-asian="10pt" style:font-size-complex="10pt"/>
    </style:style>
    <style:style style:name="P13"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169e0d" officeooo:paragraph-rsid="001c2a0f" fo:background-color="transparent" style:font-size-asian="10pt" style:font-size-complex="10pt"/>
    </style:style>
    <style:style style:name="P14" style:family="paragraph" style:parent-style-name="Standard">
      <loext:graphic-properties draw:fill="solid" draw:fill-color="#282a36" draw:opacity="100%"/>
      <style:paragraph-properties fo:background-color="#282a36"/>
      <style:text-properties style:use-window-font-color="true" loext:opacity="0%" fo:font-size="10pt" fo:language="zxx" fo:country="none" fo:font-style="normal" style:text-underline-style="none" fo:font-weight="normal" officeooo:paragraph-rsid="001c2a0f" fo:background-color="transparent" style:font-size-asian="10pt" style:font-size-complex="10pt"/>
    </style:style>
    <style:style style:name="P15"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1eeb0a" officeooo:paragraph-rsid="001eeb0a" fo:background-color="transparent" style:font-size-asian="10pt" style:font-size-complex="10pt"/>
    </style:style>
    <style:style style:name="P16"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205c49" officeooo:paragraph-rsid="00205c49" fo:background-color="transparent" style:font-size-asian="10pt" style:font-size-complex="10pt"/>
    </style:style>
    <style:style style:name="P17"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205c49" officeooo:paragraph-rsid="002191c3" fo:background-color="transparent" style:font-size-asian="10pt" style:font-size-complex="10pt"/>
    </style:style>
    <style:style style:name="P18"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21fe1e" officeooo:paragraph-rsid="00332c36" fo:background-color="transparent"/>
    </style:style>
    <style:style style:name="P19" style:family="paragraph" style:parent-style-name="Standard">
      <style:text-properties style:use-window-font-color="true" loext:opacity="0%" fo:font-size="10pt" officeooo:rsid="0021fe1e" officeooo:paragraph-rsid="0021fe1e" style:font-size-asian="10pt" style:font-size-complex="10pt"/>
    </style:style>
    <style:style style:name="P20" style:family="paragraph" style:parent-style-name="Standard">
      <style:text-properties style:use-window-font-color="true" loext:opacity="0%" officeooo:rsid="001eeb0a" officeooo:paragraph-rsid="001eeb0a"/>
    </style:style>
    <style:style style:name="P21" style:family="paragraph" style:parent-style-name="Standard">
      <style:text-properties style:use-window-font-color="true" loext:opacity="0%" officeooo:rsid="002191c3" officeooo:paragraph-rsid="002191c3"/>
    </style:style>
    <style:style style:name="P22" style:family="paragraph" style:parent-style-name="Standard">
      <style:text-properties style:use-window-font-color="true" loext:opacity="0%" officeooo:rsid="0021fe1e" officeooo:paragraph-rsid="0021fe1e"/>
    </style:style>
    <style:style style:name="P23" style:family="paragraph" style:parent-style-name="Standard">
      <style:text-properties style:use-window-font-color="true" loext:opacity="0%" officeooo:rsid="0021fe1e" officeooo:paragraph-rsid="00332c36"/>
    </style:style>
    <style:style style:name="P24" style:family="paragraph" style:parent-style-name="Standard">
      <style:text-properties style:use-window-font-color="true" loext:opacity="0%" fo:font-size="12pt" officeooo:rsid="0036b474" officeooo:paragraph-rsid="0036b474" style:font-size-asian="12pt" style:font-size-complex="12pt"/>
    </style:style>
    <style:style style:name="P25" style:family="paragraph" style:parent-style-name="Standard">
      <style:text-properties style:use-window-font-color="true" loext:opacity="0%" fo:font-size="12pt" officeooo:rsid="0034c088" officeooo:paragraph-rsid="0034c088" style:font-size-asian="12pt" style:font-size-complex="12pt"/>
    </style:style>
    <style:style style:name="P26" style:family="paragraph" style:parent-style-name="Standard">
      <style:text-properties style:use-window-font-color="true" loext:opacity="0%" fo:font-size="12pt" officeooo:rsid="0036fe94" officeooo:paragraph-rsid="0036fe94" style:font-size-asian="12pt" style:font-size-complex="12pt"/>
    </style:style>
    <style:style style:name="P27" style:family="paragraph" style:parent-style-name="Standard">
      <style:text-properties style:use-window-font-color="true" loext:opacity="0%" fo:font-size="12pt" fo:font-weight="bold" officeooo:rsid="003e004a" officeooo:paragraph-rsid="003e004a" style:font-size-asian="12pt" style:font-weight-asian="bold" style:font-size-complex="12pt" style:font-weight-complex="bold"/>
    </style:style>
    <style:style style:name="P28" style:family="paragraph" style:parent-style-name="Standard">
      <style:text-properties style:use-window-font-color="true" loext:opacity="0%" fo:font-size="12pt" fo:font-weight="normal" officeooo:rsid="003e004a" officeooo:paragraph-rsid="003e004a" style:font-size-asian="12pt" style:font-weight-asian="normal" style:font-size-complex="12pt" style:font-weight-complex="normal"/>
    </style:style>
    <style:style style:name="P29" style:family="paragraph" style:parent-style-name="Standard">
      <style:text-properties style:use-window-font-color="true" loext:opacity="0%" fo:font-size="12pt" fo:font-weight="normal" officeooo:rsid="003e004a" officeooo:paragraph-rsid="00447b79" style:font-size-asian="12pt" style:font-weight-asian="normal" style:font-size-complex="12pt" style:font-weight-complex="normal"/>
    </style:style>
    <style:style style:name="P30"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font-size="10pt" fo:language="zxx" fo:country="none" fo:font-style="normal" style:text-underline-style="none" fo:font-weight="normal" officeooo:rsid="0019f868" officeooo:paragraph-rsid="0019f868" fo:background-color="transparent" style:font-size-asian="10pt" style:font-size-complex="10pt"/>
    </style:style>
    <style:style style:name="P31"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font-size="10pt" fo:language="zxx" fo:country="none" fo:font-style="normal" style:text-underline-style="none" fo:font-weight="normal" officeooo:rsid="00169e0d" officeooo:paragraph-rsid="00184895" fo:background-color="transparent" style:font-size-asian="10pt" style:font-size-complex="10pt"/>
    </style:style>
    <style:style style:name="P32"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font-size="10pt" fo:language="zxx" fo:country="none" fo:font-style="normal" style:text-underline-style="none" fo:font-weight="normal" officeooo:rsid="00169e0d" officeooo:paragraph-rsid="001c2a0f" fo:background-color="transparent" style:font-size-asian="10pt" style:font-size-complex="10pt"/>
    </style:style>
    <style:style style:name="P33"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font-size="10pt" fo:language="zxx" fo:country="none" fo:font-style="normal" style:text-underline-style="none" fo:font-weight="normal" officeooo:rsid="001eeb0a" officeooo:paragraph-rsid="001eeb0a" fo:background-color="transparent" style:font-size-asian="10pt" style:font-size-complex="10pt"/>
    </style:style>
    <style:style style:name="P34" style:family="paragraph" style:parent-style-name="Standard">
      <loext:graphic-properties draw:fill="solid" draw:fill-color="#282a36" draw:opacity="100%"/>
      <style:paragraph-properties fo:background-color="#282a36"/>
      <style:text-properties fo:color="#f8f8f2" loext:opacity="100%" fo:font-size="10pt" fo:language="zxx" fo:country="none" fo:font-style="normal" style:text-underline-style="none" fo:font-weight="normal" officeooo:rsid="001eeb0a" officeooo:paragraph-rsid="001eeb0a" fo:background-color="transparent" style:font-size-asian="10pt" style:font-size-complex="10pt"/>
    </style:style>
    <style:style style:name="P35"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font-size="10pt" fo:language="zxx" fo:country="none" fo:font-style="normal" style:text-underline-style="none" fo:font-weight="normal" officeooo:rsid="00205c49" officeooo:paragraph-rsid="00205c49" fo:background-color="transparent" style:font-size-asian="10pt" style:font-size-complex="10pt"/>
    </style:style>
    <style:style style:name="P36"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font-size="10pt" fo:language="zxx" fo:country="none" fo:font-style="normal" style:text-underline-style="none" fo:font-weight="normal" officeooo:rsid="00205c49" officeooo:paragraph-rsid="002191c3" fo:background-color="transparent" style:font-size-asian="10pt" style:font-size-complex="10pt"/>
    </style:style>
    <style:style style:name="P37" style:family="paragraph" style:parent-style-name="Standard">
      <loext:graphic-properties draw:fill="solid" draw:fill-color="#282a36" draw:opacity="100%"/>
      <style:paragraph-properties fo:background-color="#282a36"/>
      <style:text-properties fo:color="#f8f8f2" loext:opacity="100%" fo:language="zxx" fo:country="none" fo:font-style="normal" style:text-underline-style="none" fo:font-weight="normal" officeooo:rsid="0021fe1e" officeooo:paragraph-rsid="00332c36" fo:background-color="transparent"/>
    </style:style>
    <style:style style:name="P38"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language="zxx" fo:country="none" fo:font-style="normal" style:text-underline-style="none" fo:font-weight="normal" officeooo:rsid="0021fe1e" officeooo:paragraph-rsid="0021fe1e" fo:background-color="transparent"/>
    </style:style>
    <style:style style:name="P39"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8be9fd" loext:opacity="100%" fo:font-size="10pt" fo:language="zxx" fo:country="none" fo:font-style="italic" style:text-underline-style="none" fo:font-weight="normal" officeooo:rsid="00169e0d" officeooo:paragraph-rsid="001c2a0f" fo:background-color="transparent" style:font-size-asian="10pt" style:font-size-complex="10pt"/>
    </style:style>
    <style:style style:name="P40"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8be9fd" loext:opacity="100%" fo:font-size="10pt" fo:language="zxx" fo:country="none" fo:font-style="italic" style:text-underline-style="none" fo:font-weight="normal" officeooo:rsid="001eeb0a" officeooo:paragraph-rsid="001eeb0a" fo:background-color="transparent" style:font-size-asian="10pt" style:font-size-complex="10pt"/>
    </style:style>
    <style:style style:name="P41" style:family="paragraph" style:parent-style-name="Standard">
      <style:text-properties officeooo:rsid="001eeb0a" officeooo:paragraph-rsid="001eeb0a"/>
    </style:style>
    <style:style style:name="P42" style:family="paragraph" style:parent-style-name="Standard">
      <style:text-properties officeooo:rsid="00205c49" officeooo:paragraph-rsid="002191c3"/>
    </style:style>
    <style:style style:name="P43" style:family="paragraph" style:parent-style-name="Standard">
      <loext:graphic-properties draw:fill="solid" draw:fill-color="#282a36" draw:opacity="100%"/>
      <style:paragraph-properties fo:background-color="#282a36"/>
      <style:text-properties officeooo:rsid="00205c49" officeooo:paragraph-rsid="002191c3"/>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Standard">
      <style:text-properties style:use-window-font-color="true" loext:opacity="0%" fo:font-size="10pt" officeooo:rsid="00332c36" officeooo:paragraph-rsid="00332c36" style:font-size-asian="10pt" style:font-size-complex="10pt"/>
    </style:style>
    <style:style style:name="P47"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style:use-window-font-color="true" loext:opacity="0%" fo:font-size="10pt" fo:language="zxx" fo:country="none" fo:font-style="normal" style:text-underline-style="none" fo:font-weight="normal" officeooo:rsid="003e004a" officeooo:paragraph-rsid="00474d88" fo:background-color="transparent" style:font-size-asian="10pt" style:font-weight-asian="normal" style:font-size-complex="10pt" style:font-weight-complex="normal"/>
    </style:style>
    <style:style style:name="P48" style:family="paragraph" style:parent-style-name="Standard">
      <style:text-properties style:use-window-font-color="true" loext:opacity="0%" fo:font-size="12pt" fo:font-weight="normal" officeooo:rsid="003e004a" officeooo:paragraph-rsid="0046f5cf" style:font-size-asian="12pt" style:font-weight-asian="normal" style:font-size-complex="12pt" style:font-weight-complex="normal"/>
    </style:style>
    <style:style style:name="P49" style:family="paragraph" style:parent-style-name="Standard">
      <loext:graphic-properties draw:fill="solid" draw:fill-color="#282a36" draw:opacity="100%"/>
      <style:paragraph-properties ch2_options="{'Style': 'dracula', 'Language': 'Bash', 'UseCharStyles': 0, 'LineNumberRatio': 100, 'LineNumberStart': 1, 'MasterCharStyle': '', 'ShowLineNumbers': 0, 'ColourizeBackground': 1, 'LineNumberSeparator': '  ', 'LineNumberPaddingSymbol': '', 'StoreOptionsWithSnippet': 1}" fo:background-color="#282a36"/>
      <style:text-properties fo:color="#f8f8f2" loext:opacity="100%" fo:font-size="10pt" fo:language="zxx" fo:country="none" fo:font-style="normal" style:text-underline-style="none" fo:font-weight="normal" officeooo:rsid="003e004a" officeooo:paragraph-rsid="00474d88" fo:background-color="transparent" style:font-size-asian="10pt" style:font-weight-asian="normal" style:font-size-complex="10pt" style:font-weight-complex="normal"/>
    </style:style>
    <style:style style:name="P50" style:family="paragraph" style:parent-style-name="Standard">
      <loext:graphic-properties draw:fill="solid" draw:fill-color="#282a36" draw:opacity="100%"/>
      <style:paragraph-properties fo:background-color="#282a36"/>
      <style:text-properties officeooo:paragraph-rsid="00474d88"/>
    </style:style>
    <style:style style:name="P51" style:family="paragraph" style:parent-style-name="Standard">
      <style:text-properties fo:font-weight="normal" officeooo:rsid="0048b8a2" officeooo:paragraph-rsid="0048b8a2" style:font-weight-asian="normal" style:font-weight-complex="normal"/>
    </style:style>
    <style:style style:name="P52" style:family="paragraph" style:parent-style-name="Standard">
      <style:text-properties fo:font-weight="normal" officeooo:rsid="004bc89a" officeooo:paragraph-rsid="004bc89a" style:font-weight-asian="normal" style:font-weight-complex="normal"/>
    </style:style>
    <style:style style:name="P53" style:family="paragraph" style:parent-style-name="Standard">
      <style:text-properties fo:font-weight="normal" officeooo:rsid="0054e0e2" officeooo:paragraph-rsid="0054e0e2" style:font-weight-asian="normal" style:font-weight-complex="normal"/>
    </style:style>
    <style:style style:name="P54" style:family="paragraph" style:parent-style-name="Standard">
      <style:text-properties officeooo:rsid="00474d88" officeooo:paragraph-rsid="00474d88"/>
    </style:style>
    <style:style style:name="P55" style:family="paragraph" style:parent-style-name="Standard">
      <loext:graphic-properties draw:fill="solid" draw:fill-color="#282a36" draw:opacity="100%"/>
      <style:paragraph-properties fo:background-color="#282a36"/>
      <style:text-properties officeooo:rsid="003e004a" officeooo:paragraph-rsid="00474d88"/>
    </style:style>
    <style:style style:name="P56" style:family="paragraph" style:parent-style-name="Standard">
      <style:text-properties fo:font-weight="bold" officeooo:rsid="0048b8a2" officeooo:paragraph-rsid="0048b8a2" style:font-weight-asian="bold" style:font-weight-complex="bold"/>
    </style:style>
    <style:style style:name="P57" style:family="paragraph" style:parent-style-name="Standard">
      <style:text-properties fo:font-weight="bold" officeooo:rsid="004907dd" officeooo:paragraph-rsid="004907dd" style:font-weight-asian="bold" style:font-weight-complex="bold"/>
    </style:style>
    <style:style style:name="P58" style:family="paragraph" style:parent-style-name="Standard">
      <style:text-properties fo:font-weight="bold" officeooo:rsid="004ba072" officeooo:paragraph-rsid="004ba072" style:font-weight-asian="bold" style:font-weight-complex="bold"/>
    </style:style>
    <style:style style:name="P59" style:family="paragraph" style:parent-style-name="Standard">
      <style:text-properties fo:font-weight="bold" officeooo:rsid="004bc89a" officeooo:paragraph-rsid="004bc89a" style:font-weight-asian="bold" style:font-weight-complex="bold"/>
    </style:style>
    <style:style style:name="P60" style:family="paragraph" style:parent-style-name="Standard">
      <style:text-properties fo:font-weight="bold" officeooo:rsid="0051996d" officeooo:paragraph-rsid="0051996d" style:font-weight-asian="bold" style:font-weight-complex="bold"/>
    </style:style>
    <style:style style:name="P61" style:family="paragraph" style:parent-style-name="Standard">
      <style:text-properties fo:font-weight="bold" officeooo:rsid="0054e0e2" officeooo:paragraph-rsid="0054e0e2" style:font-weight-asian="bold" style:font-weight-complex="bold"/>
    </style:style>
    <style:style style:name="T1" style:family="text">
      <style:text-properties officeooo:rsid="0019f868"/>
    </style:style>
    <style:style style:name="T2" style:family="text">
      <style:text-properties fo:color="#f8f8f2" loext:opacity="100%"/>
    </style:style>
    <style:style style:name="T3" style:family="text">
      <style:text-properties fo:color="#f8f8f2" loext:opacity="100%" fo:font-style="normal" style:text-underline-style="none" fo:font-weight="normal"/>
    </style:style>
    <style:style style:name="T4" style:family="text">
      <style:text-properties fo:color="#f8f8f2" loext:opacity="100%" officeooo:rsid="00184895"/>
    </style:style>
    <style:style style:name="T5" style:family="text">
      <style:text-properties fo:color="#f8f8f2" loext:opacity="100%" fo:font-size="10pt" style:font-size-asian="10pt" style:font-size-complex="10pt"/>
    </style:style>
    <style:style style:name="T6" style:family="text">
      <style:text-properties fo:color="#f8f8f2" loext:opacity="100%" fo:font-size="10pt" officeooo:rsid="00332c36" style:font-size-asian="10pt" style:font-size-complex="10pt"/>
    </style:style>
    <style:style style:name="T7" style:family="text">
      <style:text-properties fo:color="#f8f8f2" loext:opacity="100%" fo:font-size="10pt" fo:language="zxx" fo:country="none" fo:font-style="normal" style:text-underline-style="none" fo:font-weight="normal" fo:background-color="transparent" loext:char-shading-value="0" style:font-size-asian="10pt" style:font-size-complex="10pt"/>
    </style:style>
    <style:style style:name="T8" style:family="text">
      <style:text-properties fo:color="#f8f8f2" loext:opacity="100%" fo:font-size="10pt" fo:language="zxx" fo:country="none" fo:font-style="normal" style:text-underline-style="none" fo:font-weight="normal" officeooo:rsid="002191c3" fo:background-color="transparent" loext:char-shading-value="0" style:font-size-asian="10pt" style:font-size-complex="10pt"/>
    </style:style>
    <style:style style:name="T9" style:family="text">
      <style:text-properties fo:color="#f8f8f2" loext:opacity="100%" fo:font-size="10pt" fo:language="zxx" fo:country="none" fo:font-style="normal" style:text-underline-style="none" fo:font-weight="normal" officeooo:rsid="0046408e" fo:background-color="transparent" loext:char-shading-value="0" style:font-size-asian="10pt" style:font-weight-asian="normal" style:font-size-complex="10pt" style:font-weight-complex="normal"/>
    </style:style>
    <style:style style:name="T10" style:family="text">
      <style:text-properties fo:color="#f8f8f2" loext:opacity="100%" officeooo:rsid="001c2a0f"/>
    </style:style>
    <style:style style:name="T11" style:family="text">
      <style:text-properties fo:color="#f8f8f2" loext:opacity="100%" officeooo:rsid="0019f868"/>
    </style:style>
    <style:style style:name="T12" style:family="text">
      <style:text-properties fo:color="#f8f8f2" loext:opacity="100%" officeooo:rsid="00169e0d"/>
    </style:style>
    <style:style style:name="T13" style:family="text">
      <style:text-properties fo:color="#f8f8f2" loext:opacity="100%" officeooo:rsid="00332c36" style:font-size-asian="10pt" style:font-size-complex="10pt"/>
    </style:style>
    <style:style style:name="T14" style:family="text">
      <style:text-properties fo:color="#f8f8f2" loext:opacity="100%" officeooo:rsid="0046408e"/>
    </style:style>
    <style:style style:name="T15" style:family="text">
      <style:text-properties fo:color="#f8f8f2" loext:opacity="100%" officeooo:rsid="0046408e" style:font-weight-asian="bold" style:font-weight-complex="bold"/>
    </style:style>
    <style:style style:name="T16" style:family="text">
      <style:text-properties fo:color="#f8f8f2" loext:opacity="100%" fo:font-size="12pt" fo:language="zxx" fo:country="none" fo:font-style="normal" style:text-underline-style="none" fo:font-weight="normal" officeooo:rsid="0046408e" fo:background-color="transparent" loext:char-shading-value="0" style:font-size-asian="12pt" style:font-weight-asian="bold" style:font-size-complex="12pt" style:font-weight-complex="bold"/>
    </style:style>
    <style:style style:name="T17" style:family="text">
      <style:text-properties fo:color="#ffb86c" loext:opacity="100%"/>
    </style:style>
    <style:style style:name="T18" style:family="text">
      <style:text-properties fo:color="#ffb86c" loext:opacity="100%" fo:font-size="10pt" style:font-size-asian="10pt" style:font-size-complex="10pt"/>
    </style:style>
    <style:style style:name="T19" style:family="text">
      <style:text-properties fo:color="#ffb86c" loext:opacity="100%" fo:font-size="10pt" officeooo:rsid="00332c36" style:font-size-asian="10pt" style:font-size-complex="10pt"/>
    </style:style>
    <style:style style:name="T20" style:family="text">
      <style:text-properties fo:color="#ffb86c" loext:opacity="100%" fo:font-size="10pt" fo:language="zxx" fo:country="none" fo:font-style="normal" style:text-underline-style="none" fo:font-weight="normal" fo:background-color="transparent" loext:char-shading-value="0" style:font-size-asian="10pt" style:font-size-complex="10pt"/>
    </style:style>
    <style:style style:name="T21" style:family="text">
      <style:text-properties fo:color="#ffb86c" loext:opacity="100%" fo:font-size="10pt" fo:language="zxx" fo:country="none" fo:font-style="normal" style:text-underline-style="none" fo:font-weight="normal" officeooo:rsid="0046408e" fo:background-color="transparent" loext:char-shading-value="0" style:font-size-asian="10pt" style:font-weight-asian="normal" style:font-size-complex="10pt" style:font-weight-complex="normal"/>
    </style:style>
    <style:style style:name="T22" style:family="text">
      <style:text-properties fo:color="#ffb86c" loext:opacity="100%" officeooo:rsid="00332c36" style:font-size-asian="10pt" style:font-size-complex="10pt"/>
    </style:style>
    <style:style style:name="T23" style:family="text">
      <style:text-properties fo:color="#ffb86c" loext:opacity="100%" officeooo:rsid="0046408e"/>
    </style:style>
    <style:style style:name="T24" style:family="text">
      <style:text-properties fo:color="#8be9fd" loext:opacity="100%" fo:font-style="italic"/>
    </style:style>
    <style:style style:name="T25" style:family="text">
      <style:text-properties fo:color="#8be9fd" loext:opacity="100%" fo:font-style="italic" officeooo:rsid="00332c36" style:font-size-asian="10pt" style:font-size-complex="10pt"/>
    </style:style>
    <style:style style:name="T26" style:family="text">
      <style:text-properties fo:color="#8be9fd" loext:opacity="100%" fo:font-style="italic" officeooo:rsid="0046408e"/>
    </style:style>
    <style:style style:name="T27" style:family="text">
      <style:text-properties fo:color="#8be9fd" loext:opacity="100%" fo:font-size="10pt" fo:font-style="italic" style:font-size-asian="10pt" style:font-size-complex="10pt"/>
    </style:style>
    <style:style style:name="T28" style:family="text">
      <style:text-properties fo:color="#8be9fd" loext:opacity="100%" fo:font-size="10pt" fo:font-style="italic" officeooo:rsid="00332c36" style:font-size-asian="10pt" style:font-size-complex="10pt"/>
    </style:style>
    <style:style style:name="T29" style:family="text">
      <style:text-properties fo:color="#8be9fd" loext:opacity="100%" fo:font-size="10pt" fo:language="zxx" fo:country="none" fo:font-style="italic" style:text-underline-style="none" fo:font-weight="normal" fo:background-color="transparent" loext:char-shading-value="0" style:font-size-asian="10pt" style:font-size-complex="10pt"/>
    </style:style>
    <style:style style:name="T30" style:family="text">
      <style:text-properties fo:color="#ff79c6" loext:opacity="100%"/>
    </style:style>
    <style:style style:name="T31" style:family="text">
      <style:text-properties fo:color="#ff79c6" loext:opacity="100%" fo:font-size="10pt" fo:language="zxx" fo:country="none" fo:font-style="normal" style:text-underline-style="none" fo:font-weight="normal" fo:background-color="transparent" loext:char-shading-value="0" style:font-size-asian="10pt" style:font-size-complex="10pt"/>
    </style:style>
    <style:style style:name="T32" style:family="text">
      <style:text-properties fo:color="#ff79c6" loext:opacity="100%" fo:font-size="10pt" fo:language="zxx" fo:country="none" fo:font-style="normal" style:text-underline-style="none" fo:font-weight="normal" officeooo:rsid="0046408e" fo:background-color="transparent" loext:char-shading-value="0" style:font-size-asian="10pt" style:font-weight-asian="normal" style:font-size-complex="10pt" style:font-weight-complex="normal"/>
    </style:style>
    <style:style style:name="T33" style:family="text">
      <style:text-properties fo:color="#ff79c6" loext:opacity="100%" fo:font-size="10pt" officeooo:rsid="00332c36" style:font-size-asian="10pt" style:font-size-complex="10pt"/>
    </style:style>
    <style:style style:name="T34" style:family="text">
      <style:text-properties fo:color="#ff79c6" loext:opacity="100%" officeooo:rsid="00332c36" style:font-size-asian="10pt" style:font-size-complex="10pt"/>
    </style:style>
    <style:style style:name="T35" style:family="text">
      <style:text-properties fo:color="#ff79c6" loext:opacity="100%" officeooo:rsid="0046408e"/>
    </style:style>
    <style:style style:name="T36" style:family="text">
      <style:text-properties fo:font-size="10pt" style:font-size-asian="10pt" style:font-size-complex="10pt"/>
    </style:style>
    <style:style style:name="T37" style:family="text">
      <style:text-properties fo:font-size="10pt" officeooo:rsid="002191c3" style:font-size-asian="10pt" style:font-size-complex="10pt"/>
    </style:style>
    <style:style style:name="T38" style:family="text">
      <style:text-properties fo:font-size="10pt" officeooo:rsid="00332c36" style:font-size-asian="10pt" style:font-size-complex="10pt"/>
    </style:style>
    <style:style style:name="T39" style:family="text">
      <style:text-properties officeooo:rsid="00205c49"/>
    </style:style>
    <style:style style:name="T40" style:family="text">
      <style:text-properties officeooo:rsid="002139f5"/>
    </style:style>
    <style:style style:name="T41" style:family="text">
      <style:text-properties officeooo:rsid="002191c3"/>
    </style:style>
    <style:style style:name="T42" style:family="text">
      <style:text-properties officeooo:rsid="00332c36"/>
    </style:style>
    <style:style style:name="T43" style:family="text">
      <style:text-properties officeooo:rsid="0038f96d"/>
    </style:style>
    <style:style style:name="T44" style:family="text">
      <style:text-properties officeooo:rsid="003a86f2"/>
    </style:style>
    <style:style style:name="T45" style:family="text">
      <style:text-properties fo:font-weight="bold" officeooo:rsid="003ffb25" style:font-weight-asian="bold" style:font-weight-complex="bold"/>
    </style:style>
    <style:style style:name="T46" style:family="text">
      <style:text-properties officeooo:rsid="00407a00"/>
    </style:style>
    <style:style style:name="T47" style:family="text">
      <style:text-properties officeooo:rsid="004273f2"/>
    </style:style>
    <style:style style:name="T48" style:family="text">
      <style:text-properties officeooo:rsid="00431678"/>
    </style:style>
    <style:style style:name="T49" style:family="text">
      <style:text-properties officeooo:rsid="00447b79"/>
    </style:style>
    <style:style style:name="T50" style:family="text">
      <style:text-properties officeooo:rsid="0046408e"/>
    </style:style>
    <style:style style:name="T51" style:family="text">
      <style:text-properties style:use-window-font-color="true" loext:opacity="0%"/>
    </style:style>
    <style:style style:name="T52" style:family="text">
      <style:text-properties style:use-window-font-color="true" loext:opacity="0%" fo:language="zxx" fo:country="none" fo:background-color="transparent" loext:char-shading-value="0"/>
    </style:style>
    <style:style style:name="T53" style:family="text">
      <style:text-properties style:use-window-font-color="true" loext:opacity="0%" fo:font-weight="bold" style:font-weight-asian="bold" style:font-weight-complex="bold"/>
    </style:style>
    <style:style style:name="T54" style:family="text">
      <style:text-properties style:use-window-font-color="true" loext:opacity="0%" officeooo:rsid="004907dd"/>
    </style:style>
    <style:style style:name="T55" style:family="text">
      <style:text-properties style:use-window-font-color="true" loext:opacity="0%" fo:font-weight="normal" style:font-weight-asian="normal" style:font-weight-complex="normal"/>
    </style:style>
    <style:style style:name="T56" style:family="text">
      <style:text-properties style:use-window-font-color="true" loext:opacity="0%" fo:font-weight="normal" officeooo:rsid="004907dd" style:font-weight-asian="normal" style:font-weight-complex="normal"/>
    </style:style>
    <style:style style:name="T57" style:family="text">
      <style:text-properties style:use-window-font-color="true" loext:opacity="0%" fo:font-weight="normal" officeooo:rsid="004e5f36" style:font-weight-asian="normal" style:font-weight-complex="normal"/>
    </style:style>
    <style:style style:name="T58" style:family="text">
      <style:text-properties style:use-window-font-color="true" loext:opacity="0%" fo:font-weight="normal" officeooo:rsid="004fd940" style:font-weight-asian="normal" style:font-weight-complex="normal"/>
    </style:style>
    <style:style style:name="T59" style:family="text">
      <style:text-properties style:use-window-font-color="true" loext:opacity="0%" officeooo:rsid="004e5f36"/>
    </style:style>
    <style:style style:name="T60" style:family="text">
      <style:text-properties style:use-window-font-color="true" loext:opacity="0%" officeooo:rsid="004fd940"/>
    </style:style>
    <style:style style:name="T61" style:family="text">
      <style:text-properties style:use-window-font-color="true" loext:opacity="0%" officeooo:rsid="005199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1</text:p>
      <text:p text:style-name="P1"/>
      <text:p text:style-name="P1">Plan d’adressage : </text:p>
      <text:p text:style-name="P1"/>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Table_20_Heading">Zone</text:p>
            </table:table-cell>
            <table:table-cell table:style-name="Tableau1.A1" office:value-type="string">
              <text:p text:style-name="P45">VLAN</text:p>
            </table:table-cell>
            <table:table-cell table:style-name="Tableau1.A1" office:value-type="string">
              <text:p text:style-name="Table_20_Heading">Réseau</text:p>
            </table:table-cell>
            <table:table-cell table:style-name="Tableau1.A1" office:value-type="string">
              <text:p text:style-name="Table_20_Heading">Passerelle</text:p>
            </table:table-cell>
            <table:table-cell table:style-name="Tableau1.A1" office:value-type="string">
              <text:p text:style-name="Table_20_Heading">Utilisation</text:p>
            </table:table-cell>
          </table:table-row>
        </table:table-header-rows>
        <table:table-row>
          <table:table-cell table:style-name="Tableau1.A1" office:value-type="string">
            <text:p text:style-name="Table_20_Contents">Direction</text:p>
          </table:table-cell>
          <table:table-cell table:style-name="Tableau1.A1" office:value-type="string">
            <text:p text:style-name="P44">10</text:p>
          </table:table-cell>
          <table:table-cell table:style-name="Tableau1.A1" office:value-type="string">
            <text:p text:style-name="Table_20_Contents">10.1.10.0/24</text:p>
          </table:table-cell>
          <table:table-cell table:style-name="Tableau1.A1" office:value-type="string">
            <text:p text:style-name="Table_20_Contents">10.1.10.1</text:p>
          </table:table-cell>
          <table:table-cell table:style-name="Tableau1.A1" office:value-type="string">
            <text:p text:style-name="Table_20_Contents">Postes direction</text:p>
          </table:table-cell>
        </table:table-row>
        <table:table-row>
          <table:table-cell table:style-name="Tableau1.A1" office:value-type="string">
            <text:p text:style-name="Table_20_Contents">Admin / Finance</text:p>
          </table:table-cell>
          <table:table-cell table:style-name="Tableau1.A1" office:value-type="string">
            <text:p text:style-name="P44">20</text:p>
          </table:table-cell>
          <table:table-cell table:style-name="Tableau1.A1" office:value-type="string">
            <text:p text:style-name="Table_20_Contents">10.1.20.0/24</text:p>
          </table:table-cell>
          <table:table-cell table:style-name="Tableau1.A1" office:value-type="string">
            <text:p text:style-name="Table_20_Contents">10.1.20.1</text:p>
          </table:table-cell>
          <table:table-cell table:style-name="Tableau1.A1" office:value-type="string">
            <text:p text:style-name="Table_20_Contents">Postes administration et finance</text:p>
          </table:table-cell>
        </table:table-row>
        <table:table-row>
          <table:table-cell table:style-name="Tableau1.A1" office:value-type="string">
            <text:p text:style-name="Table_20_Contents">Commercial</text:p>
          </table:table-cell>
          <table:table-cell table:style-name="Tableau1.A1" office:value-type="string">
            <text:p text:style-name="P44">30</text:p>
          </table:table-cell>
          <table:table-cell table:style-name="Tableau1.A1" office:value-type="string">
            <text:p text:style-name="Table_20_Contents">10.1.30.0/24</text:p>
          </table:table-cell>
          <table:table-cell table:style-name="Tableau1.A1" office:value-type="string">
            <text:p text:style-name="Table_20_Contents">10.1.30.1</text:p>
          </table:table-cell>
          <table:table-cell table:style-name="Tableau1.A1" office:value-type="string">
            <text:p text:style-name="Table_20_Contents">Postes commerciaux</text:p>
          </table:table-cell>
        </table:table-row>
        <table:table-row>
          <table:table-cell table:style-name="Tableau1.A1" office:value-type="string">
            <text:p text:style-name="Table_20_Contents">Technique</text:p>
          </table:table-cell>
          <table:table-cell table:style-name="Tableau1.A1" office:value-type="string">
            <text:p text:style-name="P44">40</text:p>
          </table:table-cell>
          <table:table-cell table:style-name="Tableau1.A1" office:value-type="string">
            <text:p text:style-name="Table_20_Contents">10.1.40.0/24</text:p>
          </table:table-cell>
          <table:table-cell table:style-name="Tableau1.A1" office:value-type="string">
            <text:p text:style-name="Table_20_Contents">10.1.40.1</text:p>
          </table:table-cell>
          <table:table-cell table:style-name="Tableau1.A1" office:value-type="string">
            <text:p text:style-name="Table_20_Contents">Postes techniques</text:p>
          </table:table-cell>
        </table:table-row>
        <table:table-row>
          <table:table-cell table:style-name="Tableau1.A1" office:value-type="string">
            <text:p text:style-name="Table_20_Contents">DMZ</text:p>
          </table:table-cell>
          <table:table-cell table:style-name="Tableau1.A1" office:value-type="string">
            <text:p text:style-name="P44">50</text:p>
          </table:table-cell>
          <table:table-cell table:style-name="Tableau1.A1" office:value-type="string">
            <text:p text:style-name="Table_20_Contents">10.1.50.0/24</text:p>
          </table:table-cell>
          <table:table-cell table:style-name="Tableau1.A1" office:value-type="string">
            <text:p text:style-name="Table_20_Contents">10.1.50.1</text:p>
          </table:table-cell>
          <table:table-cell table:style-name="Tableau1.A1" office:value-type="string">
            <text:p text:style-name="Table_20_Contents">Serveurs publics Web/FTP</text:p>
          </table:table-cell>
        </table:table-row>
        <table:table-row>
          <table:table-cell table:style-name="Tableau1.A1" office:value-type="string">
            <text:p text:style-name="Table_20_Contents">Serveurs internes</text:p>
          </table:table-cell>
          <table:table-cell table:style-name="Tableau1.A1" office:value-type="string">
            <text:p text:style-name="P44">60</text:p>
          </table:table-cell>
          <table:table-cell table:style-name="Tableau1.A1" office:value-type="string">
            <text:p text:style-name="Table_20_Contents">10.1.60.0/24</text:p>
          </table:table-cell>
          <table:table-cell table:style-name="Tableau1.A1" office:value-type="string">
            <text:p text:style-name="Table_20_Contents">10.1.60.1</text:p>
          </table:table-cell>
          <table:table-cell table:style-name="Tableau1.A1" office:value-type="string">
            <text:p text:style-name="Table_20_Contents">DHCP, DNS, serveurs de fichiers</text:p>
          </table:table-cell>
        </table:table-row>
        <table:table-row>
          <table:table-cell table:style-name="Tableau1.A1" office:value-type="string">
            <text:p text:style-name="Table_20_Contents">Management</text:p>
          </table:table-cell>
          <table:table-cell table:style-name="Tableau1.A1" office:value-type="string">
            <text:p text:style-name="P44">99</text:p>
          </table:table-cell>
          <table:table-cell table:style-name="Tableau1.A1" office:value-type="string">
            <text:p text:style-name="Table_20_Contents">10.1.99.0/24</text:p>
          </table:table-cell>
          <table:table-cell table:style-name="Tableau1.A1" office:value-type="string">
            <text:p text:style-name="Table_20_Contents">10.1.99.1</text:p>
          </table:table-cell>
          <table:table-cell table:style-name="Tableau1.A1" office:value-type="string">
            <text:p text:style-name="Table_20_Contents">IP de gestion des switches</text:p>
          </table:table-cell>
        </table:table-row>
        <table:table-row>
          <table:table-cell table:style-name="Tableau1.A1" office:value-type="string">
            <text:p text:style-name="Table_20_Contents">Transit pfSense / L3</text:p>
          </table:table-cell>
          <table:table-cell table:style-name="Tableau1.A1" office:value-type="string">
            <text:p text:style-name="P44">-</text:p>
          </table:table-cell>
          <table:table-cell table:style-name="Tableau1.A1" office:value-type="string">
            <text:p text:style-name="Table_20_Contents">10.1.254.0/30</text:p>
          </table:table-cell>
          <table:table-cell table:style-name="Tableau1.A1" office:value-type="string">
            <text:p text:style-name="Table_20_Contents">-</text:p>
          </table:table-cell>
          <table:table-cell table:style-name="Tableau1.A1" office:value-type="string">
            <text:p text:style-name="Table_20_Contents">Lien entre pfSense et switch L3</text:p>
          </table:table-cell>
        </table:table-row>
      </table:table>
      <text:p text:style-name="P1"/>
      <text:p text:style-name="P1"/>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Équipement</text:p>
            </table:table-cell>
            <table:table-cell table:style-name="Tableau2.A1" office:value-type="string">
              <text:p text:style-name="Table_20_Heading">Interface / rôle</text:p>
            </table:table-cell>
            <table:table-cell table:style-name="Tableau2.A1" office:value-type="string">
              <text:p text:style-name="Table_20_Heading">Adresse IP</text:p>
            </table:table-cell>
          </table:table-row>
        </table:table-header-rows>
        <table:table-row>
          <table:table-cell table:style-name="Tableau2.A1" office:value-type="string">
            <text:p text:style-name="Table_20_Contents">pfSense</text:p>
          </table:table-cell>
          <table:table-cell table:style-name="Tableau2.A1" office:value-type="string">
            <text:p text:style-name="Table_20_Contents">WAN</text:p>
          </table:table-cell>
          <table:table-cell table:style-name="Tableau2.A1" office:value-type="string">
            <text:p text:style-name="Table_20_Contents">DHCP ou IP fournie par le Cloud GNS3</text:p>
          </table:table-cell>
        </table:table-row>
        <table:table-row>
          <table:table-cell table:style-name="Tableau2.A1" office:value-type="string">
            <text:p text:style-name="Table_20_Contents">pfSense</text:p>
          </table:table-cell>
          <table:table-cell table:style-name="Tableau2.A1" office:value-type="string">
            <text:p text:style-name="Table_20_Contents">Transit vers switch L3</text:p>
          </table:table-cell>
          <table:table-cell table:style-name="Tableau2.A1" office:value-type="string">
            <text:p text:style-name="Table_20_Contents">10.1.254.1/30</text:p>
          </table:table-cell>
        </table:table-row>
        <table:table-row>
          <table:table-cell table:style-name="Tableau2.A1" office:value-type="string">
            <text:p text:style-name="Table_20_Contents">Switch L3</text:p>
          </table:table-cell>
          <table:table-cell table:style-name="Tableau2.A1" office:value-type="string">
            <text:p text:style-name="Table_20_Contents">Transit vers pfSense</text:p>
          </table:table-cell>
          <table:table-cell table:style-name="Tableau2.A1" office:value-type="string">
            <text:p text:style-name="Table_20_Contents">10.1.254.2/30</text:p>
          </table:table-cell>
        </table:table-row>
        <table:table-row>
          <table:table-cell table:style-name="Tableau2.A1" office:value-type="string">
            <text:p text:style-name="Table_20_Contents">pfSense</text:p>
          </table:table-cell>
          <table:table-cell table:style-name="Tableau2.A1" office:value-type="string">
            <text:p text:style-name="Table_20_Contents">DMZ</text:p>
          </table:table-cell>
          <table:table-cell table:style-name="Tableau2.A1" office:value-type="string">
            <text:p text:style-name="Table_20_Contents">10.1.50.1/24</text:p>
          </table:table-cell>
        </table:table-row>
        <table:table-row>
          <table:table-cell table:style-name="Tableau2.A1" office:value-type="string">
            <text:p text:style-name="Table_20_Contents">Switch L3</text:p>
          </table:table-cell>
          <table:table-cell table:style-name="Tableau2.A1" office:value-type="string">
            <text:p text:style-name="Table_20_Contents">VLAN 10</text:p>
          </table:table-cell>
          <table:table-cell table:style-name="Tableau2.A1" office:value-type="string">
            <text:p text:style-name="Table_20_Contents">10.1.10.1/24</text:p>
          </table:table-cell>
        </table:table-row>
        <table:table-row>
          <table:table-cell table:style-name="Tableau2.A1" office:value-type="string">
            <text:p text:style-name="Table_20_Contents">Switch L3</text:p>
          </table:table-cell>
          <table:table-cell table:style-name="Tableau2.A1" office:value-type="string">
            <text:p text:style-name="Table_20_Contents">VLAN 20</text:p>
          </table:table-cell>
          <table:table-cell table:style-name="Tableau2.A1" office:value-type="string">
            <text:p text:style-name="Table_20_Contents">10.1.20.1/24</text:p>
          </table:table-cell>
        </table:table-row>
        <table:table-row>
          <table:table-cell table:style-name="Tableau2.A1" office:value-type="string">
            <text:p text:style-name="Table_20_Contents">Switch L3</text:p>
          </table:table-cell>
          <table:table-cell table:style-name="Tableau2.A1" office:value-type="string">
            <text:p text:style-name="Table_20_Contents">VLAN 30</text:p>
          </table:table-cell>
          <table:table-cell table:style-name="Tableau2.A1" office:value-type="string">
            <text:p text:style-name="Table_20_Contents">10.1.30.1/24</text:p>
          </table:table-cell>
        </table:table-row>
        <table:table-row>
          <table:table-cell table:style-name="Tableau2.A1" office:value-type="string">
            <text:p text:style-name="Table_20_Contents">Switch L3</text:p>
          </table:table-cell>
          <table:table-cell table:style-name="Tableau2.A1" office:value-type="string">
            <text:p text:style-name="Table_20_Contents">VLAN 40</text:p>
          </table:table-cell>
          <table:table-cell table:style-name="Tableau2.A1" office:value-type="string">
            <text:p text:style-name="Table_20_Contents">10.1.40.1/24</text:p>
          </table:table-cell>
        </table:table-row>
        <table:table-row>
          <table:table-cell table:style-name="Tableau2.A1" office:value-type="string">
            <text:p text:style-name="Table_20_Contents">Switch L3</text:p>
          </table:table-cell>
          <table:table-cell table:style-name="Tableau2.A1" office:value-type="string">
            <text:p text:style-name="Table_20_Contents">VLAN 60</text:p>
          </table:table-cell>
          <table:table-cell table:style-name="Tableau2.A1" office:value-type="string">
            <text:p text:style-name="Table_20_Contents">10.1.60.1/24</text:p>
          </table:table-cell>
        </table:table-row>
        <table:table-row>
          <table:table-cell table:style-name="Tableau2.A1" office:value-type="string">
            <text:p text:style-name="Table_20_Contents">Switch L3</text:p>
          </table:table-cell>
          <table:table-cell table:style-name="Tableau2.A1" office:value-type="string">
            <text:p text:style-name="Table_20_Contents">VLAN 99</text:p>
          </table:table-cell>
          <table:table-cell table:style-name="Tableau2.A1" office:value-type="string">
            <text:p text:style-name="Table_20_Contents">10.1.99.1/24</text:p>
          </table:table-cell>
        </table:table-row>
      </table:table>
      <text:p text:style-name="P1"/>
      <text:p text:style-name="P1"/>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Serveur</text:p>
            </table:table-cell>
            <table:table-cell table:style-name="Tableau3.A1" office:value-type="string">
              <text:p text:style-name="Table_20_Heading">Zone</text:p>
            </table:table-cell>
            <table:table-cell table:style-name="Tableau3.A1" office:value-type="string">
              <text:p text:style-name="Table_20_Heading">Adresse IP</text:p>
            </table:table-cell>
            <table:table-cell table:style-name="Tableau3.A1" office:value-type="string">
              <text:p text:style-name="Table_20_Heading">Rôle</text:p>
            </table:table-cell>
          </table:table-row>
        </table:table-header-rows>
        <table:table-row>
          <table:table-cell table:style-name="Tableau3.A1" office:value-type="string">
            <text:p text:style-name="Table_20_Contents">DHCP</text:p>
          </table:table-cell>
          <table:table-cell table:style-name="Tableau3.A1" office:value-type="string">
            <text:p text:style-name="Table_20_Contents">VLAN 60</text:p>
          </table:table-cell>
          <table:table-cell table:style-name="Tableau3.A1" office:value-type="string">
            <text:p text:style-name="Table_20_Contents">10.1.60.5</text:p>
          </table:table-cell>
          <table:table-cell table:style-name="Tableau3.A1" office:value-type="string">
            <text:p text:style-name="Table_20_Contents">Attribution IP aux postes</text:p>
          </table:table-cell>
        </table:table-row>
        <table:table-row>
          <table:table-cell table:style-name="Tableau3.A1" office:value-type="string">
            <text:p text:style-name="Table_20_Contents">DNS</text:p>
          </table:table-cell>
          <table:table-cell table:style-name="Tableau3.A1" office:value-type="string">
            <text:p text:style-name="Table_20_Contents">VLAN 60</text:p>
          </table:table-cell>
          <table:table-cell table:style-name="Tableau3.A1" office:value-type="string">
            <text:p text:style-name="Table_20_Contents">10.1.60.53</text:p>
          </table:table-cell>
          <table:table-cell table:style-name="Tableau3.A1" office:value-type="string">
            <text:p text:style-name="Table_20_Contents">Résolution DNS interne</text:p>
          </table:table-cell>
        </table:table-row>
        <table:table-row>
          <table:table-cell table:style-name="Tableau3.A1" office:value-type="string">
            <text:p text:style-name="Table_20_Contents">Serveur données Direction</text:p>
          </table:table-cell>
          <table:table-cell table:style-name="Tableau3.A1" office:value-type="string">
            <text:p text:style-name="Table_20_Contents">VLAN 60</text:p>
          </table:table-cell>
          <table:table-cell table:style-name="Tableau3.A1" office:value-type="string">
            <text:p text:style-name="Table_20_Contents">10.1.60.10</text:p>
          </table:table-cell>
          <table:table-cell table:style-name="Tableau3.A1" office:value-type="string">
            <text:p text:style-name="Table_20_Contents">Données direction</text:p>
          </table:table-cell>
        </table:table-row>
        <table:table-row>
          <table:table-cell table:style-name="Tableau3.A1" office:value-type="string">
            <text:p text:style-name="Table_20_Contents">Serveur données Admin/Finance</text:p>
          </table:table-cell>
          <table:table-cell table:style-name="Tableau3.A1" office:value-type="string">
            <text:p text:style-name="Table_20_Contents">VLAN 60</text:p>
          </table:table-cell>
          <table:table-cell table:style-name="Tableau3.A1" office:value-type="string">
            <text:p text:style-name="Table_20_Contents">10.1.60.20</text:p>
          </table:table-cell>
          <table:table-cell table:style-name="Tableau3.A1" office:value-type="string">
            <text:p text:style-name="Table_20_Contents">Données finance</text:p>
          </table:table-cell>
        </table:table-row>
        <table:table-row>
          <table:table-cell table:style-name="Tableau3.A1" office:value-type="string">
            <text:p text:style-name="Table_20_Contents">Serveur données Commercial/Technique</text:p>
          </table:table-cell>
          <table:table-cell table:style-name="Tableau3.A1" office:value-type="string">
            <text:p text:style-name="Table_20_Contents">VLAN 60</text:p>
          </table:table-cell>
          <table:table-cell table:style-name="Tableau3.A1" office:value-type="string">
            <text:p text:style-name="Table_20_Contents">10.1.60.30</text:p>
          </table:table-cell>
          <table:table-cell table:style-name="Tableau3.A1" office:value-type="string">
            <text:p text:style-name="Table_20_Contents">Données commercial + technique</text:p>
          </table:table-cell>
        </table:table-row>
        <table:table-row>
          <table:table-cell table:style-name="Tableau3.A1" office:value-type="string">
            <text:p text:style-name="Table_20_Contents">Web public</text:p>
          </table:table-cell>
          <table:table-cell table:style-name="Tableau3.A1" office:value-type="string">
            <text:p text:style-name="Table_20_Contents">DMZ</text:p>
          </table:table-cell>
          <table:table-cell table:style-name="Tableau3.A1" office:value-type="string">
            <text:p text:style-name="Table_20_Contents">10.1.50.10</text:p>
          </table:table-cell>
          <table:table-cell table:style-name="Tableau3.A1" office:value-type="string">
            <text:p text:style-name="Table_20_Contents">Site Web accessible extérieur</text:p>
          </table:table-cell>
        </table:table-row>
        <table:table-row>
          <table:table-cell table:style-name="Tableau3.A1" office:value-type="string">
            <text:p text:style-name="Table_20_Contents">FTP public</text:p>
          </table:table-cell>
          <table:table-cell table:style-name="Tableau3.A1" office:value-type="string">
            <text:p text:style-name="Table_20_Contents">DMZ</text:p>
          </table:table-cell>
          <table:table-cell table:style-name="Tableau3.A1" office:value-type="string">
            <text:p text:style-name="Table_20_Contents">10.1.50.20</text:p>
          </table:table-cell>
          <table:table-cell table:style-name="Tableau3.A1" office:value-type="string">
            <text:p text:style-name="Table_20_Contents">FTP accessible extérieur</text:p>
          </table:table-cell>
        </table:table-row>
      </table:table>
      <text:p text:style-name="P1"/>
      <text:p text:style-name="P1"/>
      <table:table table:name="Tableau4" table:style-name="Tableau4">
        <table:table-column table:style-name="Tableau4.A"/>
        <table:table-column table:style-name="Tableau4.B"/>
        <table:table-header-rows>
          <table:table-row>
            <table:table-cell table:style-name="Tableau4.A1" office:value-type="string">
              <text:p text:style-name="Table_20_Heading">VLAN</text:p>
            </table:table-cell>
            <table:table-cell table:style-name="Tableau4.A1" office:value-type="string">
              <text:p text:style-name="Table_20_Heading">Plage DHCP</text:p>
            </table:table-cell>
          </table:table-row>
        </table:table-header-rows>
        <table:table-row>
          <table:table-cell table:style-name="Tableau4.A1" office:value-type="string">
            <text:p text:style-name="Table_20_Contents">VLAN 10</text:p>
          </table:table-cell>
          <table:table-cell table:style-name="Tableau4.A1" office:value-type="string">
            <text:p text:style-name="Table_20_Contents">10.1.10.100 à 10.1.10.199</text:p>
          </table:table-cell>
        </table:table-row>
        <table:table-row>
          <table:table-cell table:style-name="Tableau4.A1" office:value-type="string">
            <text:p text:style-name="Table_20_Contents">VLAN 20</text:p>
          </table:table-cell>
          <table:table-cell table:style-name="Tableau4.A1" office:value-type="string">
            <text:p text:style-name="Table_20_Contents">10.1.20.100 à 10.1.20.199</text:p>
          </table:table-cell>
        </table:table-row>
        <table:table-row>
          <table:table-cell table:style-name="Tableau4.A1" office:value-type="string">
            <text:p text:style-name="Table_20_Contents">VLAN 30</text:p>
          </table:table-cell>
          <table:table-cell table:style-name="Tableau4.A1" office:value-type="string">
            <text:p text:style-name="Table_20_Contents">10.1.30.100 à 10.1.30.199</text:p>
          </table:table-cell>
        </table:table-row>
        <table:table-row>
          <table:table-cell table:style-name="Tableau4.A1" office:value-type="string">
            <text:p text:style-name="Table_20_Contents">VLAN 40</text:p>
          </table:table-cell>
          <table:table-cell table:style-name="Tableau4.A1" office:value-type="string">
            <text:p text:style-name="Table_20_Contents">10.1.40.100 à 10.1.40.199</text:p>
          </table:table-cell>
        </table:table-row>
      </table:table>
      <text:p text:style-name="P1"/>
      <text:p text:style-name="P1"/>
      <text:p text:style-name="P2"><text:soft-page-break/>S-L2</text:p>
      <text:p text:style-name="P2"/>
      <text:p text:style-name="P2">Création des VLAN 10 et 20 : </text:p>
      <text:p text:style-name="P2"/>
      <text:p text:style-name="P5"><draw:frame draw:style-name="fr4" draw:name="Image1" text:anchor-type="char" svg:width="16.722cm" svg:height="4.63cm" draw:z-index="0"><draw:image xlink:href="Pictures/1000000000000278000000AF22239B94.png" xlink:type="simple" xlink:show="embed" xlink:actuate="onLoad" draw:mime-type="image/png"/></draw:frame><text:line-break/><draw:frame draw:style-name="fr1" draw:name="Image2" text:anchor-type="char" svg:x="0.206cm" svg:y="5.106cm" svg:width="14.737cm" svg:height="6.006cm" draw:z-index="1"><draw:image xlink:href="Pictures/100000000000022D000000E32102C6A9.png" xlink:type="simple" xlink:show="embed" xlink:actuate="onLoad" draw:mime-type="image/png"/></draw:frame><text:line-break/><text:line-break/><text:line-break/><text:line-break/><text:line-break/><text:line-break/><text:line-break/><text:line-break/><text:line-break/><text:line-break/><text:line-break/></text:p>
      <text:p text:style-name="P5"/>
      <text:p text:style-name="P39">enable<text:span text:style-name="T3"/></text:p>
      <text:p text:style-name="P32">configure terminal</text:p>
      <text:p text:style-name="P32"/>
      <text:p text:style-name="P13"><text:span text:style-name="T2">hostname S-</text:span><text:span text:style-name="T10">L2</text:span></text:p>
      <text:p text:style-name="P32"/>
      <text:p text:style-name="P13"><text:span text:style-name="T2">vlan </text:span><text:span text:style-name="T17">10</text:span></text:p>
      <text:p text:style-name="P13"><text:span text:style-name="T2"><text:s/>name DIRECTION</text:span><text:span text:style-name="T3"/></text:p>
      <text:p text:style-name="P39">exit<text:span text:style-name="T3"/></text:p>
      <text:p text:style-name="P32"/>
      <text:p text:style-name="P13"><text:span text:style-name="T2">vlan </text:span><text:span text:style-name="T17">20</text:span></text:p>
      <text:p text:style-name="P13"><text:span text:style-name="T2"><text:s/>name ADMIN_FINANCE</text:span><text:span text:style-name="T3"/></text:p>
      <text:p text:style-name="P39">exit<text:span text:style-name="T3"/></text:p>
      <text:p text:style-name="P32"/>
      <text:p text:style-name="P13"><text:span text:style-name="T2">interface gi0/</text:span><text:span text:style-name="T10">0</text:span></text:p>
      <text:p text:style-name="P13"><text:span text:style-name="T2"><text:s/>description PC-DIR-01_VLAN10</text:span><text:span text:style-name="T3"/></text:p>
      <text:p text:style-name="P13"><text:span text:style-name="T2"><text:s/>switchport mode access</text:span><text:span text:style-name="T3"/></text:p>
      <text:p text:style-name="P13"><text:span text:style-name="T2"><text:s/>switchport access vlan </text:span><text:span text:style-name="T17">10</text:span></text:p>
      <text:p text:style-name="P13"><text:span text:style-name="T2"><text:s/>no shutdown</text:span><text:span text:style-name="T3"/></text:p>
      <text:p text:style-name="P39">exit<text:span text:style-name="T3"/></text:p>
      <text:p text:style-name="P32"/>
      <text:p text:style-name="P13"><text:span text:style-name="T2">interface gi0/</text:span><text:span text:style-name="T10">1</text:span></text:p>
      <text:p text:style-name="P13"><text:span text:style-name="T2"><text:s/>description PC-FIN-01_VLAN20</text:span><text:span text:style-name="T3"/></text:p>
      <text:p text:style-name="P13"><text:span text:style-name="T2"><text:s/>switchport mode access</text:span><text:span text:style-name="T3"/></text:p>
      <text:p text:style-name="P13"><text:span text:style-name="T2"><text:s/>switchport access vlan </text:span><text:span text:style-name="T17">20</text:span></text:p>
      <text:p text:style-name="P13"><text:span text:style-name="T2"><text:s/>no shutdown</text:span><text:span text:style-name="T3"/></text:p>
      <text:p text:style-name="P39">exit<text:span text:style-name="T3"/></text:p>
      <text:p text:style-name="P32"/>
      <text:p text:style-name="P13"><text:span text:style-name="T2">interface gi0/</text:span><text:span text:style-name="T10">2</text:span></text:p>
      <text:p text:style-name="P14"><text:span text:style-name="T12"><text:s/>description TRUNK_VERS_S</text:span><text:span text:style-name="T10">WITCH-L3</text:span><text:span text:style-name="T2"><text:line-break/>switchport trunk encapsulation dot1q<text:line-break/></text:span><text:soft-page-break/><text:span text:style-name="T2">switchport mode trunk<text:line-break/>switchport trunk allowed vlan </text:span><text:span text:style-name="T17">10</text:span><text:span text:style-name="T2">,20<text:line-break/>no shutdown<text:line-break/></text:span><text:span text:style-name="T24">exit</text:span></text:p>
      <text:p text:style-name="P32"/>
      <text:p text:style-name="P32">end<text:span text:style-name="T3"/></text:p>
      <text:p text:style-name="P7"><text:span text:style-name="T5">write memory</text:span><text:span text:style-name="T2"><text:line-break/><text:line-break/><text:line-break/>S-L</text:span><text:span text:style-name="T4">3</text:span></text:p>
      <text:p text:style-name="P3"/>
      <text:p text:style-name="P3">Création des VLAN 10 et 20 :</text:p>
      <text:p text:style-name="P3"/>
      <text:p text:style-name="P5"><draw:frame draw:style-name="fr2" draw:name="Image3" text:anchor-type="char" svg:width="17cm" svg:height="9.052cm" draw:z-index="2"><draw:image xlink:href="Pictures/100000000000028600000158DA67214D.png" xlink:type="simple" xlink:show="embed" xlink:actuate="onLoad" draw:mime-type="image/png"/></draw:frame><draw:frame draw:style-name="fr1" draw:name="Image4" text:anchor-type="char" svg:x="0.166cm" svg:y="9.71cm" svg:width="16.034cm" svg:height="6.429cm" draw:z-index="3"><draw:image xlink:href="Pictures/100000000000025E000000F327A59D1B.png" xlink:type="simple" xlink:show="embed" xlink:actuate="onLoad" draw:mime-type="image/png"/></draw:frame><text:line-break/><text:line-break/><text:line-break/><text:line-break/><text:line-break/><text:line-break/></text:p>
      <text:p text:style-name="P5"/>
      <text:p text:style-name="P7"><text:soft-page-break/><text:span text:style-name="T2"><text:line-break/><text:line-break/><text:line-break/><text:line-break/><text:line-break/><text:line-break/><text:line-break/><text:line-break/><text:line-break/><text:line-break/><text:line-break/><text:line-break/><text:line-break/><text:line-break/></text:span><text:span text:style-name="T27">e</text:span><draw:frame draw:style-name="fr1" draw:name="Image5" text:anchor-type="char" svg:x="0.102cm" svg:y="0.404cm" svg:width="14.843cm" svg:height="6.033cm" draw:z-index="4"><draw:image xlink:href="Pictures/1000000000000231000000E4A5C620A7.png" xlink:type="simple" xlink:show="embed" xlink:actuate="onLoad" draw:mime-type="image/png"/></draw:frame><text:span text:style-name="T27">nable</text:span></text:p>
      <text:p text:style-name="P32">configure terminal</text:p>
      <text:p text:style-name="P32"/>
      <text:p text:style-name="P13"><text:span text:style-name="T2">hostname S-</text:span><text:span text:style-name="T10">L3</text:span></text:p>
      <text:p text:style-name="P32"/>
      <text:p text:style-name="P13"><text:span text:style-name="T2">vlan </text:span><text:span text:style-name="T17">10</text:span></text:p>
      <text:p text:style-name="P13"><text:span text:style-name="T2"><text:s/>name DIRECTION</text:span><text:span text:style-name="T3"/></text:p>
      <text:p text:style-name="P39">exit<text:span text:style-name="T3"/></text:p>
      <text:p text:style-name="P32"/>
      <text:p text:style-name="P13"><text:span text:style-name="T2">vlan </text:span><text:span text:style-name="T17">20</text:span></text:p>
      <text:p text:style-name="P13"><text:span text:style-name="T2"><text:s/>name ADMIN_FINANCE</text:span><text:span text:style-name="T3"/></text:p>
      <text:p text:style-name="P39">exit<text:span text:style-name="T3"/></text:p>
      <text:p text:style-name="P32"/>
      <text:p text:style-name="P32">ip routing</text:p>
      <text:p text:style-name="P32"/>
      <text:p text:style-name="P13"><text:span text:style-name="T2">interface vlan </text:span><text:span text:style-name="T17">10</text:span></text:p>
      <text:p text:style-name="P13"><text:span text:style-name="T2"><text:s/>description PASSERELLE_DIRECTION</text:span><text:span text:style-name="T3"/></text:p>
      <text:p text:style-name="P13"><text:span text:style-name="T2"><text:s/>ip address </text:span><text:span text:style-name="T17">10</text:span><text:span text:style-name="T2">.1.10.1 </text:span><text:span text:style-name="T17">255</text:span><text:span text:style-name="T2">.255.255.0</text:span></text:p>
      <text:p text:style-name="P13"><text:span text:style-name="T2"><text:s/>no shutdown</text:span><text:span text:style-name="T3"/></text:p>
      <text:p text:style-name="P39">exit<text:span text:style-name="T3"/></text:p>
      <text:p text:style-name="P32"/>
      <text:p text:style-name="P13"><text:span text:style-name="T2">interface vlan </text:span><text:span text:style-name="T17">20</text:span></text:p>
      <text:p text:style-name="P13"><text:span text:style-name="T2"><text:s/>description PASSERELLE_ADMIN_FINANCE</text:span><text:span text:style-name="T3"/></text:p>
      <text:p text:style-name="P13"><text:span text:style-name="T2"><text:s/>ip address </text:span><text:span text:style-name="T17">10</text:span><text:span text:style-name="T2">.1.20.1 </text:span><text:span text:style-name="T17">255</text:span><text:span text:style-name="T2">.255.255.0</text:span></text:p>
      <text:p text:style-name="P13"><text:span text:style-name="T2"><text:s/>no shutdown</text:span><text:span text:style-name="T3"/></text:p>
      <text:p text:style-name="P39">exit<text:span text:style-name="T3"/></text:p>
      <text:p text:style-name="P32"/>
      <text:p text:style-name="P32">interface gi0/1</text:p>
      <text:p text:style-name="P13"><text:span text:style-name="T2"><text:s/>description TRUNK_VERS_SW</text:span><text:span text:style-name="T10">ITCH-L2</text:span></text:p>
      <text:p text:style-name="P32">switchport trunk encapsulation dot1q<text:line-break/>switchport mode trunk<text:line-break/>switchport trunk allowed vlan 10,20<text:line-break/>no shutdown<text:line-break/>exit</text:p>
      <text:p text:style-name="P32">end<text:span text:style-name="T3"/></text:p>
      <text:p text:style-name="P7"><text:span text:style-name="T5">write memory</text:span><text:span text:style-name="T2"><text:line-break/><text:line-break/></text:span><text:span text:style-name="T11">Test ping PC1 :</text:span><text:span text:style-name="T1"> </text:span></text:p>
      <text:p text:style-name="P3"/>
      <text:p text:style-name="P12"><text:span text:style-name="T2">PC1&gt; ping </text:span><text:span text:style-name="T17">10</text:span><text:span text:style-name="T2">.1.10.1</text:span></text:p>
      <text:p text:style-name="P31"/>
      <text:p text:style-name="P12"><text:span text:style-name="T17">84</text:span><text:span text:style-name="T2"> bytes from </text:span><text:span text:style-name="T17">10</text:span><text:span text:style-name="T2">.1.10.1 </text:span><text:span text:style-name="T24">icmp_seq</text:span><text:span text:style-name="T30">=</text:span><text:span text:style-name="T17">1</text:span><text:span text:style-name="T2"> </text:span><text:span text:style-name="T24">ttl</text:span><text:span text:style-name="T30">=</text:span><text:span text:style-name="T17">255</text:span><text:span text:style-name="T2"> </text:span><text:span text:style-name="T24">time</text:span><text:span text:style-name="T30">=</text:span><text:span text:style-name="T17">10</text:span><text:span text:style-name="T2">.746 ms</text:span></text:p>
      <text:p text:style-name="P12"><text:span text:style-name="T17">84</text:span><text:span text:style-name="T2"> bytes from </text:span><text:span text:style-name="T17">10</text:span><text:span text:style-name="T2">.1.10.1 </text:span><text:span text:style-name="T24">icmp_seq</text:span><text:span text:style-name="T30">=</text:span><text:span text:style-name="T17">2</text:span><text:span text:style-name="T2"> </text:span><text:span text:style-name="T24">ttl</text:span><text:span text:style-name="T30">=</text:span><text:span text:style-name="T17">255</text:span><text:span text:style-name="T2"> </text:span><text:span text:style-name="T24">time</text:span><text:span text:style-name="T30">=</text:span><text:span text:style-name="T17">4</text:span><text:span text:style-name="T2">.371 ms</text:span></text:p>
      <text:p text:style-name="P12"><text:span text:style-name="T17">84</text:span><text:span text:style-name="T2"> bytes from </text:span><text:span text:style-name="T17">10</text:span><text:span text:style-name="T2">.1.10.1 </text:span><text:span text:style-name="T24">icmp_seq</text:span><text:span text:style-name="T30">=</text:span><text:span text:style-name="T17">3</text:span><text:span text:style-name="T2"> </text:span><text:span text:style-name="T24">ttl</text:span><text:span text:style-name="T30">=</text:span><text:span text:style-name="T17">255</text:span><text:span text:style-name="T2"> </text:span><text:span text:style-name="T24">time</text:span><text:span text:style-name="T30">=</text:span><text:span text:style-name="T17">6</text:span><text:span text:style-name="T2">.081 ms</text:span></text:p>
      <text:p text:style-name="P12"><text:span text:style-name="T17">84</text:span><text:span text:style-name="T2"> bytes from </text:span><text:span text:style-name="T17">10</text:span><text:span text:style-name="T2">.1.10.1 </text:span><text:span text:style-name="T24">icmp_seq</text:span><text:span text:style-name="T30">=</text:span><text:span text:style-name="T17">4</text:span><text:span text:style-name="T2"> </text:span><text:span text:style-name="T24">ttl</text:span><text:span text:style-name="T30">=</text:span><text:span text:style-name="T17">255</text:span><text:span text:style-name="T2"> </text:span><text:span text:style-name="T24">time</text:span><text:span text:style-name="T30">=</text:span><text:span text:style-name="T17">8</text:span><text:span text:style-name="T2">.408 ms</text:span></text:p>
      <text:p text:style-name="P12"><text:soft-page-break/><text:span text:style-name="T17">84</text:span><text:span text:style-name="T2"> bytes from </text:span><text:span text:style-name="T17">10</text:span><text:span text:style-name="T2">.1.10.1 </text:span><text:span text:style-name="T24">icmp_seq</text:span><text:span text:style-name="T30">=</text:span><text:span text:style-name="T17">5</text:span><text:span text:style-name="T2"> </text:span><text:span text:style-name="T24">ttl</text:span><text:span text:style-name="T30">=</text:span><text:span text:style-name="T17">255</text:span><text:span text:style-name="T2"> </text:span><text:span text:style-name="T24">time</text:span><text:span text:style-name="T30">=</text:span><text:span text:style-name="T17">4</text:span><text:span text:style-name="T2">.246 ms</text:span></text:p>
      <text:p text:style-name="P31">^C<text:span text:style-name="T3"/></text:p>
      <text:p text:style-name="P12"><text:span text:style-name="T2">PC1&gt; ping </text:span><text:span text:style-name="T17">10</text:span><text:span text:style-name="T2">.1.20.1</text:span></text:p>
      <text:p text:style-name="P31"/>
      <text:p text:style-name="P12"><text:span text:style-name="T17">84</text:span><text:span text:style-name="T2"> bytes from </text:span><text:span text:style-name="T17">10</text:span><text:span text:style-name="T2">.1.20.1 </text:span><text:span text:style-name="T24">icmp_seq</text:span><text:span text:style-name="T30">=</text:span><text:span text:style-name="T17">1</text:span><text:span text:style-name="T2"> </text:span><text:span text:style-name="T24">ttl</text:span><text:span text:style-name="T30">=</text:span><text:span text:style-name="T17">255</text:span><text:span text:style-name="T2"> </text:span><text:span text:style-name="T24">time</text:span><text:span text:style-name="T30">=</text:span><text:span text:style-name="T17">9</text:span><text:span text:style-name="T2">.257 ms</text:span></text:p>
      <text:p text:style-name="P12"><text:span text:style-name="T17">84</text:span><text:span text:style-name="T2"> bytes from </text:span><text:span text:style-name="T17">10</text:span><text:span text:style-name="T2">.1.20.1 </text:span><text:span text:style-name="T24">icmp_seq</text:span><text:span text:style-name="T30">=</text:span><text:span text:style-name="T17">2</text:span><text:span text:style-name="T2"> </text:span><text:span text:style-name="T24">ttl</text:span><text:span text:style-name="T30">=</text:span><text:span text:style-name="T17">255</text:span><text:span text:style-name="T2"> </text:span><text:span text:style-name="T24">time</text:span><text:span text:style-name="T30">=</text:span><text:span text:style-name="T17">10</text:span><text:span text:style-name="T2">.071 ms</text:span></text:p>
      <text:p text:style-name="P12"><text:span text:style-name="T17">84</text:span><text:span text:style-name="T2"> bytes from </text:span><text:span text:style-name="T17">10</text:span><text:span text:style-name="T2">.1.20.1 </text:span><text:span text:style-name="T24">icmp_seq</text:span><text:span text:style-name="T30">=</text:span><text:span text:style-name="T17">3</text:span><text:span text:style-name="T2"> </text:span><text:span text:style-name="T24">ttl</text:span><text:span text:style-name="T30">=</text:span><text:span text:style-name="T17">255</text:span><text:span text:style-name="T2"> </text:span><text:span text:style-name="T24">time</text:span><text:span text:style-name="T30">=</text:span><text:span text:style-name="T17">4</text:span><text:span text:style-name="T2">.189 ms</text:span></text:p>
      <text:p text:style-name="P12"><text:span text:style-name="T17">84</text:span><text:span text:style-name="T2"> bytes from </text:span><text:span text:style-name="T17">10</text:span><text:span text:style-name="T2">.1.20.1 </text:span><text:span text:style-name="T24">icmp_seq</text:span><text:span text:style-name="T30">=</text:span><text:span text:style-name="T17">4</text:span><text:span text:style-name="T2"> </text:span><text:span text:style-name="T24">ttl</text:span><text:span text:style-name="T30">=</text:span><text:span text:style-name="T17">255</text:span><text:span text:style-name="T2"> </text:span><text:span text:style-name="T24">time</text:span><text:span text:style-name="T30">=</text:span><text:span text:style-name="T17">7</text:span><text:span text:style-name="T2">.874 ms</text:span></text:p>
      <text:p text:style-name="P12"><text:span text:style-name="T17">84</text:span><text:span text:style-name="T2"> bytes from </text:span><text:span text:style-name="T17">10</text:span><text:span text:style-name="T2">.1.20.1 </text:span><text:span text:style-name="T24">icmp_seq</text:span><text:span text:style-name="T30">=</text:span><text:span text:style-name="T17">5</text:span><text:span text:style-name="T2"> </text:span><text:span text:style-name="T24">ttl</text:span><text:span text:style-name="T30">=</text:span><text:span text:style-name="T17">255</text:span><text:span text:style-name="T2"> </text:span><text:span text:style-name="T24">time</text:span><text:span text:style-name="T30">=</text:span><text:span text:style-name="T17">11</text:span><text:span text:style-name="T2">.097 ms</text:span></text:p>
      <text:p text:style-name="P31">^C<text:span text:style-name="T3"/></text:p>
      <text:p text:style-name="P12"><text:span text:style-name="T2">PC1&gt; ping </text:span><text:span text:style-name="T17">10</text:span><text:span text:style-name="T2">.1.20.11</text:span></text:p>
      <text:p text:style-name="P31"/>
      <text:p text:style-name="P12"><text:span text:style-name="T17">10</text:span><text:span text:style-name="T2">.1.20.11 </text:span><text:span text:style-name="T24">icmp_seq</text:span><text:span text:style-name="T30">=</text:span><text:span text:style-name="T17">1</text:span><text:span text:style-name="T2"> timeout</text:span></text:p>
      <text:p text:style-name="P12"><text:span text:style-name="T17">84</text:span><text:span text:style-name="T2"> bytes from </text:span><text:span text:style-name="T17">10</text:span><text:span text:style-name="T2">.1.20.11 </text:span><text:span text:style-name="T24">icmp_seq</text:span><text:span text:style-name="T30">=</text:span><text:span text:style-name="T17">2</text:span><text:span text:style-name="T2"> </text:span><text:span text:style-name="T24">ttl</text:span><text:span text:style-name="T30">=</text:span><text:span text:style-name="T17">63</text:span><text:span text:style-name="T2"> </text:span><text:span text:style-name="T24">time</text:span><text:span text:style-name="T30">=</text:span><text:span text:style-name="T17">10</text:span><text:span text:style-name="T2">.297 ms</text:span></text:p>
      <text:p text:style-name="P12"><text:span text:style-name="T17">84</text:span><text:span text:style-name="T2"> bytes from </text:span><text:span text:style-name="T17">10</text:span><text:span text:style-name="T2">.1.20.11 </text:span><text:span text:style-name="T24">icmp_seq</text:span><text:span text:style-name="T30">=</text:span><text:span text:style-name="T17">3</text:span><text:span text:style-name="T2"> </text:span><text:span text:style-name="T24">ttl</text:span><text:span text:style-name="T30">=</text:span><text:span text:style-name="T17">63</text:span><text:span text:style-name="T2"> </text:span><text:span text:style-name="T24">time</text:span><text:span text:style-name="T30">=</text:span><text:span text:style-name="T17">15</text:span><text:span text:style-name="T2">.117 ms</text:span></text:p>
      <text:p text:style-name="P12"><text:span text:style-name="T17">84</text:span><text:span text:style-name="T2"> bytes from </text:span><text:span text:style-name="T17">10</text:span><text:span text:style-name="T2">.1.20.11 </text:span><text:span text:style-name="T24">icmp_seq</text:span><text:span text:style-name="T30">=</text:span><text:span text:style-name="T17">4</text:span><text:span text:style-name="T2"> </text:span><text:span text:style-name="T24">ttl</text:span><text:span text:style-name="T30">=</text:span><text:span text:style-name="T17">63</text:span><text:span text:style-name="T2"> </text:span><text:span text:style-name="T24">time</text:span><text:span text:style-name="T30">=</text:span><text:span text:style-name="T17">8</text:span><text:span text:style-name="T2">.457 ms</text:span></text:p>
      <text:p text:style-name="P12"><text:span text:style-name="T17">84</text:span><text:span text:style-name="T2"> bytes from </text:span><text:span text:style-name="T17">10</text:span><text:span text:style-name="T2">.1.20.11 </text:span><text:span text:style-name="T24">icmp_seq</text:span><text:span text:style-name="T30">=</text:span><text:span text:style-name="T17">5</text:span><text:span text:style-name="T2"> </text:span><text:span text:style-name="T24">ttl</text:span><text:span text:style-name="T30">=</text:span><text:span text:style-name="T17">63</text:span><text:span text:style-name="T2"> </text:span><text:span text:style-name="T24">time</text:span><text:span text:style-name="T30">=</text:span><text:span text:style-name="T17">9</text:span><text:span text:style-name="T2">.287 ms</text:span></text:p>
      <text:p text:style-name="P3"/>
      <text:p text:style-name="P6">Test ping PC2</text:p>
      <text:p text:style-name="P6"/>
      <text:p text:style-name="P11"><text:span text:style-name="T2">PC2&gt; ping </text:span><text:span text:style-name="T17">10</text:span><text:span text:style-name="T2">.1.20.1</text:span></text:p>
      <text:p text:style-name="P30"/>
      <text:p text:style-name="P11"><text:span text:style-name="T17">84</text:span><text:span text:style-name="T2"> bytes from </text:span><text:span text:style-name="T17">10</text:span><text:span text:style-name="T2">.1.20.1 </text:span><text:span text:style-name="T24">icmp_seq</text:span><text:span text:style-name="T30">=</text:span><text:span text:style-name="T17">1</text:span><text:span text:style-name="T2"> </text:span><text:span text:style-name="T24">ttl</text:span><text:span text:style-name="T30">=</text:span><text:span text:style-name="T17">255</text:span><text:span text:style-name="T2"> </text:span><text:span text:style-name="T24">time</text:span><text:span text:style-name="T30">=</text:span><text:span text:style-name="T17">5</text:span><text:span text:style-name="T2">.809 ms</text:span></text:p>
      <text:p text:style-name="P11"><text:span text:style-name="T17">84</text:span><text:span text:style-name="T2"> bytes from </text:span><text:span text:style-name="T17">10</text:span><text:span text:style-name="T2">.1.20.1 </text:span><text:span text:style-name="T24">icmp_seq</text:span><text:span text:style-name="T30">=</text:span><text:span text:style-name="T17">2</text:span><text:span text:style-name="T2"> </text:span><text:span text:style-name="T24">ttl</text:span><text:span text:style-name="T30">=</text:span><text:span text:style-name="T17">255</text:span><text:span text:style-name="T2"> </text:span><text:span text:style-name="T24">time</text:span><text:span text:style-name="T30">=</text:span><text:span text:style-name="T17">5</text:span><text:span text:style-name="T2">.106 ms</text:span></text:p>
      <text:p text:style-name="P11"><text:span text:style-name="T17">84</text:span><text:span text:style-name="T2"> bytes from </text:span><text:span text:style-name="T17">10</text:span><text:span text:style-name="T2">.1.20.1 </text:span><text:span text:style-name="T24">icmp_seq</text:span><text:span text:style-name="T30">=</text:span><text:span text:style-name="T17">3</text:span><text:span text:style-name="T2"> </text:span><text:span text:style-name="T24">ttl</text:span><text:span text:style-name="T30">=</text:span><text:span text:style-name="T17">255</text:span><text:span text:style-name="T2"> </text:span><text:span text:style-name="T24">time</text:span><text:span text:style-name="T30">=</text:span><text:span text:style-name="T17">5</text:span><text:span text:style-name="T2">.341 ms</text:span></text:p>
      <text:p text:style-name="P11"><text:span text:style-name="T17">84</text:span><text:span text:style-name="T2"> bytes from </text:span><text:span text:style-name="T17">10</text:span><text:span text:style-name="T2">.1.20.1 </text:span><text:span text:style-name="T24">icmp_seq</text:span><text:span text:style-name="T30">=</text:span><text:span text:style-name="T17">4</text:span><text:span text:style-name="T2"> </text:span><text:span text:style-name="T24">ttl</text:span><text:span text:style-name="T30">=</text:span><text:span text:style-name="T17">255</text:span><text:span text:style-name="T2"> </text:span><text:span text:style-name="T24">time</text:span><text:span text:style-name="T30">=</text:span><text:span text:style-name="T17">4</text:span><text:span text:style-name="T2">.991 ms</text:span></text:p>
      <text:p text:style-name="P11"><text:span text:style-name="T17">84</text:span><text:span text:style-name="T2"> bytes from </text:span><text:span text:style-name="T17">10</text:span><text:span text:style-name="T2">.1.20.1 </text:span><text:span text:style-name="T24">icmp_seq</text:span><text:span text:style-name="T30">=</text:span><text:span text:style-name="T17">5</text:span><text:span text:style-name="T2"> </text:span><text:span text:style-name="T24">ttl</text:span><text:span text:style-name="T30">=</text:span><text:span text:style-name="T17">255</text:span><text:span text:style-name="T2"> </text:span><text:span text:style-name="T24">time</text:span><text:span text:style-name="T30">=</text:span><text:span text:style-name="T17">4</text:span><text:span text:style-name="T2">.450 ms</text:span></text:p>
      <text:p text:style-name="P30"/>
      <text:p text:style-name="P11"><text:span text:style-name="T2">PC2&gt; ping </text:span><text:span text:style-name="T17">10</text:span><text:span text:style-name="T2">.1.10.1</text:span></text:p>
      <text:p text:style-name="P30"/>
      <text:p text:style-name="P11"><text:span text:style-name="T17">84</text:span><text:span text:style-name="T2"> bytes from </text:span><text:span text:style-name="T17">10</text:span><text:span text:style-name="T2">.1.10.1 </text:span><text:span text:style-name="T24">icmp_seq</text:span><text:span text:style-name="T30">=</text:span><text:span text:style-name="T17">1</text:span><text:span text:style-name="T2"> </text:span><text:span text:style-name="T24">ttl</text:span><text:span text:style-name="T30">=</text:span><text:span text:style-name="T17">255</text:span><text:span text:style-name="T2"> </text:span><text:span text:style-name="T24">time</text:span><text:span text:style-name="T30">=</text:span><text:span text:style-name="T17">5</text:span><text:span text:style-name="T2">.193 ms</text:span></text:p>
      <text:p text:style-name="P11"><text:span text:style-name="T17">84</text:span><text:span text:style-name="T2"> bytes from </text:span><text:span text:style-name="T17">10</text:span><text:span text:style-name="T2">.1.10.1 </text:span><text:span text:style-name="T24">icmp_seq</text:span><text:span text:style-name="T30">=</text:span><text:span text:style-name="T17">2</text:span><text:span text:style-name="T2"> </text:span><text:span text:style-name="T24">ttl</text:span><text:span text:style-name="T30">=</text:span><text:span text:style-name="T17">255</text:span><text:span text:style-name="T2"> </text:span><text:span text:style-name="T24">time</text:span><text:span text:style-name="T30">=</text:span><text:span text:style-name="T17">5</text:span><text:span text:style-name="T2">.123 ms</text:span></text:p>
      <text:p text:style-name="P11"><text:span text:style-name="T17">84</text:span><text:span text:style-name="T2"> bytes from </text:span><text:span text:style-name="T17">10</text:span><text:span text:style-name="T2">.1.10.1 </text:span><text:span text:style-name="T24">icmp_seq</text:span><text:span text:style-name="T30">=</text:span><text:span text:style-name="T17">3</text:span><text:span text:style-name="T2"> </text:span><text:span text:style-name="T24">ttl</text:span><text:span text:style-name="T30">=</text:span><text:span text:style-name="T17">255</text:span><text:span text:style-name="T2"> </text:span><text:span text:style-name="T24">time</text:span><text:span text:style-name="T30">=</text:span><text:span text:style-name="T17">6</text:span><text:span text:style-name="T2">.415 ms</text:span></text:p>
      <text:p text:style-name="P11"><text:span text:style-name="T17">84</text:span><text:span text:style-name="T2"> bytes from </text:span><text:span text:style-name="T17">10</text:span><text:span text:style-name="T2">.1.10.1 </text:span><text:span text:style-name="T24">icmp_seq</text:span><text:span text:style-name="T30">=</text:span><text:span text:style-name="T17">4</text:span><text:span text:style-name="T2"> </text:span><text:span text:style-name="T24">ttl</text:span><text:span text:style-name="T30">=</text:span><text:span text:style-name="T17">255</text:span><text:span text:style-name="T2"> </text:span><text:span text:style-name="T24">time</text:span><text:span text:style-name="T30">=</text:span><text:span text:style-name="T17">5</text:span><text:span text:style-name="T2">.400 ms</text:span></text:p>
      <text:p text:style-name="P11"><text:span text:style-name="T17">84</text:span><text:span text:style-name="T2"> bytes from </text:span><text:span text:style-name="T17">10</text:span><text:span text:style-name="T2">.1.10.1 </text:span><text:span text:style-name="T24">icmp_seq</text:span><text:span text:style-name="T30">=</text:span><text:span text:style-name="T17">5</text:span><text:span text:style-name="T2"> </text:span><text:span text:style-name="T24">ttl</text:span><text:span text:style-name="T30">=</text:span><text:span text:style-name="T17">255</text:span><text:span text:style-name="T2"> </text:span><text:span text:style-name="T24">time</text:span><text:span text:style-name="T30">=</text:span><text:span text:style-name="T17">5</text:span><text:span text:style-name="T2">.343 ms</text:span></text:p>
      <text:p text:style-name="P30"/>
      <text:p text:style-name="P11"><text:span text:style-name="T2">PC2&gt; ping </text:span><text:span text:style-name="T17">10</text:span><text:span text:style-name="T2">.1.10.11</text:span></text:p>
      <text:p text:style-name="P30"/>
      <text:p text:style-name="P11"><text:span text:style-name="T17">84</text:span><text:span text:style-name="T2"> bytes from </text:span><text:span text:style-name="T17">10</text:span><text:span text:style-name="T2">.1.10.11 </text:span><text:span text:style-name="T24">icmp_seq</text:span><text:span text:style-name="T30">=</text:span><text:span text:style-name="T17">1</text:span><text:span text:style-name="T2"> </text:span><text:span text:style-name="T24">ttl</text:span><text:span text:style-name="T30">=</text:span><text:span text:style-name="T17">63</text:span><text:span text:style-name="T2"> </text:span><text:span text:style-name="T24">time</text:span><text:span text:style-name="T30">=</text:span><text:span text:style-name="T17">7</text:span><text:span text:style-name="T2">.831 ms</text:span></text:p>
      <text:p text:style-name="P11"><text:span text:style-name="T17">84</text:span><text:span text:style-name="T2"> bytes from </text:span><text:span text:style-name="T17">10</text:span><text:span text:style-name="T2">.1.10.11 </text:span><text:span text:style-name="T24">icmp_seq</text:span><text:span text:style-name="T30">=</text:span><text:span text:style-name="T17">2</text:span><text:span text:style-name="T2"> </text:span><text:span text:style-name="T24">ttl</text:span><text:span text:style-name="T30">=</text:span><text:span text:style-name="T17">63</text:span><text:span text:style-name="T2"> </text:span><text:span text:style-name="T24">time</text:span><text:span text:style-name="T30">=</text:span><text:span text:style-name="T17">5</text:span><text:span text:style-name="T2">.361 ms</text:span></text:p>
      <text:p text:style-name="P11"><text:span text:style-name="T17">84</text:span><text:span text:style-name="T2"> bytes from </text:span><text:span text:style-name="T17">10</text:span><text:span text:style-name="T2">.1.10.11 </text:span><text:span text:style-name="T24">icmp_seq</text:span><text:span text:style-name="T30">=</text:span><text:span text:style-name="T17">3</text:span><text:span text:style-name="T2"> </text:span><text:span text:style-name="T24">ttl</text:span><text:span text:style-name="T30">=</text:span><text:span text:style-name="T17">63</text:span><text:span text:style-name="T2"> </text:span><text:span text:style-name="T24">time</text:span><text:span text:style-name="T30">=</text:span><text:span text:style-name="T17">8</text:span><text:span text:style-name="T2">.479 ms</text:span></text:p>
      <text:p text:style-name="P11"><text:span text:style-name="T17">84</text:span><text:span text:style-name="T2"> bytes from </text:span><text:span text:style-name="T17">10</text:span><text:span text:style-name="T2">.1.10.11 </text:span><text:span text:style-name="T24">icmp_seq</text:span><text:span text:style-name="T30">=</text:span><text:span text:style-name="T17">4</text:span><text:span text:style-name="T2"> </text:span><text:span text:style-name="T24">ttl</text:span><text:span text:style-name="T30">=</text:span><text:span text:style-name="T17">63</text:span><text:span text:style-name="T2"> </text:span><text:span text:style-name="T24">time</text:span><text:span text:style-name="T30">=</text:span><text:span text:style-name="T17">8</text:span><text:span text:style-name="T2">.122 ms</text:span></text:p>
      <text:p text:style-name="P11"><text:span text:style-name="T17">84</text:span><text:span text:style-name="T2"> bytes from </text:span><text:span text:style-name="T17">10</text:span><text:span text:style-name="T2">.1.10.11 </text:span><text:span text:style-name="T24">icmp_seq</text:span><text:span text:style-name="T30">=</text:span><text:span text:style-name="T17">5</text:span><text:span text:style-name="T2"> </text:span><text:span text:style-name="T24">ttl</text:span><text:span text:style-name="T30">=</text:span><text:span text:style-name="T17">63</text:span><text:span text:style-name="T2"> </text:span><text:span text:style-name="T24">time</text:span><text:span text:style-name="T30">=</text:span><text:span text:style-name="T17">8</text:span><text:span text:style-name="T2">.395 ms</text:span></text:p>
      <text:p text:style-name="P4"/>
      <text:p text:style-name="P20">Lien vers Pfsense</text:p>
      <text:p text:style-name="P20"/>
      <text:p text:style-name="P40">enable<text:span text:style-name="T3"/></text:p>
      <text:p text:style-name="P33">configure terminal</text:p>
      <text:p text:style-name="P33"/>
      <text:p text:style-name="P33">interface gi0/1</text:p>
      <text:p text:style-name="P15"><text:span text:style-name="T2"><text:s/>description LIEN_VERS_PFSENSE</text:span><text:span text:style-name="T3"/></text:p>
      <text:p text:style-name="P15"><text:span text:style-name="T2"><text:s/>no switchport</text:span><text:span text:style-name="T3"/></text:p>
      <text:p text:style-name="P15"><text:span text:style-name="T2"><text:s/>ip address </text:span><text:span text:style-name="T17">10</text:span><text:span text:style-name="T2">.1.254.2 </text:span><text:span text:style-name="T17">255</text:span><text:span text:style-name="T2">.255.255.252</text:span></text:p>
      <text:p text:style-name="P15"><text:span text:style-name="T2"><text:s/>no shutdown</text:span><text:span text:style-name="T3"/></text:p>
      <text:p text:style-name="P40">exit<text:span text:style-name="T3"/></text:p>
      <text:p text:style-name="P33"/>
      <text:p text:style-name="P15"><text:span text:style-name="T2">ip route </text:span><text:span text:style-name="T17">0</text:span><text:span text:style-name="T2">.0.0.0 </text:span><text:span text:style-name="T17">0</text:span><text:span text:style-name="T2">.0.0.0 </text:span><text:span text:style-name="T17">10</text:span><text:span text:style-name="T2">.1.254.1</text:span></text:p>
      <text:p text:style-name="P33"/>
      <text:p text:style-name="P33">end<text:span text:style-name="T3"/></text:p>
      <text:p text:style-name="P34">write memory</text:p>
      <text:p text:style-name="P41"><text:soft-page-break/><text:line-break/><text:span text:style-name="T39">Configuration Pfsense : <text:line-break/><text:line-break/></text:span><draw:frame draw:style-name="fr1" draw:name="Image6" text:anchor-type="char" svg:x="0.229cm" svg:y="1.401cm" svg:width="15.002cm" svg:height="6.959cm" draw:z-index="5"><draw:image xlink:href="Pictures/10000000000002370000010735D9F913.png" xlink:type="simple" xlink:show="embed" xlink:actuate="onLoad" draw:mime-type="image/png"/></draw:frame><text:span text:style-name="T39"><text:line-break/></text:span><draw:frame draw:style-name="fr1" draw:name="Image7" text:anchor-type="char" svg:x="0.065cm" svg:y="9.26cm" svg:width="17cm" svg:height="9.123cm" draw:z-index="6"><draw:image xlink:href="Pictures/100000000000028E0000015FBF4B2304.png" xlink:type="simple" xlink:show="embed" xlink:actuate="onLoad" draw:mime-type="image/png"/></draw:frame><text:span text:style-name="T39"><text:line-break/>Test ping vers Pfsense : <text:line-break/></text:span><draw:frame draw:style-name="fr1" draw:name="Image8" text:anchor-type="char" svg:x="0.386cm" svg:y="20.814cm" svg:width="14.552cm" svg:height="2.328cm" draw:z-index="7"><draw:image xlink:href="Pictures/100000000000022600000058694F3D69.png" xlink:type="simple" xlink:show="embed" xlink:actuate="onLoad" draw:mime-type="image/png"/></draw:frame><text:span text:style-name="T39"><text:line-break/><text:line-break/><text:line-break/><text:line-break/><text:line-break/><text:line-break/><text:line-break/>Ca fonctionne.</text:span></text:p>
      <text:p text:style-name="P41"><text:line-break/><text:span text:style-name="T40">Sur webterm : </text:span></text:p>
      <text:p text:style-name="P41"/>
      <text:p text:style-name="P41"><draw:frame draw:style-name="fr2" draw:name="Image9" text:anchor-type="char" svg:width="17cm" svg:height="10.252cm" draw:z-index="8"><draw:image xlink:href="Pictures/100000000000028A00000188332A0993.png" xlink:type="simple" xlink:show="embed" xlink:actuate="onLoad" draw:mime-type="image/png"/></draw:frame><text:soft-page-break/><text:line-break/><draw:frame draw:style-name="fr1" draw:name="Image10" text:anchor-type="char" svg:x="0.397cm" svg:y="10.739cm" svg:width="17cm" svg:height="6.034cm" draw:z-index="9"><draw:image xlink:href="Pictures/100000000000036C000001377CC1E1D4.png" xlink:type="simple" xlink:show="embed" xlink:actuate="onLoad" draw:mime-type="image/png"/></draw:frame><text:line-break/><draw:frame draw:style-name="fr1" draw:name="Image11" text:anchor-type="char" svg:x="0.418cm" svg:y="20.098cm" svg:width="17cm" svg:height="11.659cm" draw:z-index="10"><draw:image xlink:href="Pictures/100000000000031F00000224BBF7F085.png" xlink:type="simple" xlink:show="embed" xlink:actuate="onLoad" draw:mime-type="image/png"/></draw:frame></text:p>
      <text:p text:style-name="P8"><text:soft-page-break/><text:span text:style-name="T2">Depuis PC1 : <text:line-break/><text:line-break/></text:span><text:span text:style-name="T5">PC1&gt; ping </text:span><text:span text:style-name="T18">10</text:span><text:span text:style-name="T5">.1.254.1</text:span></text:p>
      <text:p text:style-name="P35"/>
      <text:p text:style-name="P16"><text:span text:style-name="T17">84</text:span><text:span text:style-name="T2"> bytes from </text:span><text:span text:style-name="T17">10</text:span><text:span text:style-name="T2">.1.254.1 </text:span><text:span text:style-name="T24">icmp_seq</text:span><text:span text:style-name="T30">=</text:span><text:span text:style-name="T17">1</text:span><text:span text:style-name="T2"> </text:span><text:span text:style-name="T24">ttl</text:span><text:span text:style-name="T30">=</text:span><text:span text:style-name="T17">63</text:span><text:span text:style-name="T2"> </text:span><text:span text:style-name="T24">time</text:span><text:span text:style-name="T30">=</text:span><text:span text:style-name="T17">7</text:span><text:span text:style-name="T2">.210 ms</text:span></text:p>
      <text:p text:style-name="P16"><text:span text:style-name="T17">84</text:span><text:span text:style-name="T2"> bytes from </text:span><text:span text:style-name="T17">10</text:span><text:span text:style-name="T2">.1.254.1 </text:span><text:span text:style-name="T24">icmp_seq</text:span><text:span text:style-name="T30">=</text:span><text:span text:style-name="T17">2</text:span><text:span text:style-name="T2"> </text:span><text:span text:style-name="T24">ttl</text:span><text:span text:style-name="T30">=</text:span><text:span text:style-name="T17">63</text:span><text:span text:style-name="T2"> </text:span><text:span text:style-name="T24">time</text:span><text:span text:style-name="T30">=</text:span><text:span text:style-name="T17">4</text:span><text:span text:style-name="T2">.661 ms</text:span></text:p>
      <text:p text:style-name="P16"><text:span text:style-name="T17">84</text:span><text:span text:style-name="T2"> bytes from </text:span><text:span text:style-name="T17">10</text:span><text:span text:style-name="T2">.1.254.1 </text:span><text:span text:style-name="T24">icmp_seq</text:span><text:span text:style-name="T30">=</text:span><text:span text:style-name="T17">3</text:span><text:span text:style-name="T2"> </text:span><text:span text:style-name="T24">ttl</text:span><text:span text:style-name="T30">=</text:span><text:span text:style-name="T17">63</text:span><text:span text:style-name="T2"> </text:span><text:span text:style-name="T24">time</text:span><text:span text:style-name="T30">=</text:span><text:span text:style-name="T17">4</text:span><text:span text:style-name="T2">.293 ms</text:span></text:p>
      <text:p text:style-name="P16"><text:span text:style-name="T17">84</text:span><text:span text:style-name="T2"> bytes from </text:span><text:span text:style-name="T17">10</text:span><text:span text:style-name="T2">.1.254.1 </text:span><text:span text:style-name="T24">icmp_seq</text:span><text:span text:style-name="T30">=</text:span><text:span text:style-name="T17">4</text:span><text:span text:style-name="T2"> </text:span><text:span text:style-name="T24">ttl</text:span><text:span text:style-name="T30">=</text:span><text:span text:style-name="T17">63</text:span><text:span text:style-name="T2"> </text:span><text:span text:style-name="T24">time</text:span><text:span text:style-name="T30">=</text:span><text:span text:style-name="T17">5</text:span><text:span text:style-name="T2">.262 ms</text:span></text:p>
      <text:p text:style-name="P16"><text:span text:style-name="T17">84</text:span><text:span text:style-name="T2"> bytes from </text:span><text:span text:style-name="T17">10</text:span><text:span text:style-name="T2">.1.254.1 </text:span><text:span text:style-name="T24">icmp_seq</text:span><text:span text:style-name="T30">=</text:span><text:span text:style-name="T17">5</text:span><text:span text:style-name="T2"> </text:span><text:span text:style-name="T24">ttl</text:span><text:span text:style-name="T30">=</text:span><text:span text:style-name="T17">63</text:span><text:span text:style-name="T2"> </text:span><text:span text:style-name="T24">time</text:span><text:span text:style-name="T30">=</text:span><text:span text:style-name="T17">6</text:span><text:span text:style-name="T2">.024 ms</text:span></text:p>
      <text:p text:style-name="P42"><text:line-break/><text:span text:style-name="T41">Depuis PC2 : </text:span></text:p>
      <text:p text:style-name="P42"/>
      <text:p text:style-name="P17"><text:span text:style-name="T2">PC2&gt; ping </text:span><text:span text:style-name="T17">10</text:span><text:span text:style-name="T2">.1.254.1</text:span></text:p>
      <text:p text:style-name="P36"/>
      <text:p text:style-name="P17"><text:span text:style-name="T17">84</text:span><text:span text:style-name="T2"> bytes from </text:span><text:span text:style-name="T17">10</text:span><text:span text:style-name="T2">.1.254.1 </text:span><text:span text:style-name="T24">icmp_seq</text:span><text:span text:style-name="T30">=</text:span><text:span text:style-name="T17">1</text:span><text:span text:style-name="T2"> </text:span><text:span text:style-name="T24">ttl</text:span><text:span text:style-name="T30">=</text:span><text:span text:style-name="T17">63</text:span><text:span text:style-name="T2"> </text:span><text:span text:style-name="T24">time</text:span><text:span text:style-name="T30">=</text:span><text:span text:style-name="T17">4</text:span><text:span text:style-name="T2">.011 ms</text:span></text:p>
      <text:p text:style-name="P17"><text:span text:style-name="T17">84</text:span><text:span text:style-name="T2"> bytes from </text:span><text:span text:style-name="T17">10</text:span><text:span text:style-name="T2">.1.254.1 </text:span><text:span text:style-name="T24">icmp_seq</text:span><text:span text:style-name="T30">=</text:span><text:span text:style-name="T17">2</text:span><text:span text:style-name="T2"> </text:span><text:span text:style-name="T24">ttl</text:span><text:span text:style-name="T30">=</text:span><text:span text:style-name="T17">63</text:span><text:span text:style-name="T2"> </text:span><text:span text:style-name="T24">time</text:span><text:span text:style-name="T30">=</text:span><text:span text:style-name="T17">5</text:span><text:span text:style-name="T2">.015 ms</text:span></text:p>
      <text:p text:style-name="P17"><text:span text:style-name="T17">84</text:span><text:span text:style-name="T2"> bytes from </text:span><text:span text:style-name="T17">10</text:span><text:span text:style-name="T2">.1.254.1 </text:span><text:span text:style-name="T24">icmp_seq</text:span><text:span text:style-name="T30">=</text:span><text:span text:style-name="T17">3</text:span><text:span text:style-name="T2"> </text:span><text:span text:style-name="T24">ttl</text:span><text:span text:style-name="T30">=</text:span><text:span text:style-name="T17">63</text:span><text:span text:style-name="T2"> </text:span><text:span text:style-name="T24">time</text:span><text:span text:style-name="T30">=</text:span><text:span text:style-name="T17">6</text:span><text:span text:style-name="T2">.090 ms</text:span></text:p>
      <text:p text:style-name="P17"><text:span text:style-name="T17">84</text:span><text:span text:style-name="T2"> bytes from </text:span><text:span text:style-name="T17">10</text:span><text:span text:style-name="T2">.1.254.1 </text:span><text:span text:style-name="T24">icmp_seq</text:span><text:span text:style-name="T30">=</text:span><text:span text:style-name="T17">4</text:span><text:span text:style-name="T2"> </text:span><text:span text:style-name="T24">ttl</text:span><text:span text:style-name="T30">=</text:span><text:span text:style-name="T17">63</text:span><text:span text:style-name="T2"> </text:span><text:span text:style-name="T24">time</text:span><text:span text:style-name="T30">=</text:span><text:span text:style-name="T17">4</text:span><text:span text:style-name="T2">.550 ms</text:span></text:p>
      <text:p text:style-name="P43"><text:span text:style-name="T20">84</text:span><text:span text:style-name="T7"> bytes from </text:span><text:span text:style-name="T20">10</text:span><text:span text:style-name="T7">.1.254.1 </text:span><text:span text:style-name="T29">icmp_seq</text:span><text:span text:style-name="T31">=</text:span><text:span text:style-name="T20">5</text:span><text:span text:style-name="T7"> </text:span><text:span text:style-name="T29">ttl</text:span><text:span text:style-name="T31">=</text:span><text:span text:style-name="T20">63</text:span><text:span text:style-name="T7"> </text:span><text:span text:style-name="T29">time</text:span><text:span text:style-name="T31">=</text:span><text:span text:style-name="T20">6</text:span><text:span text:style-name="T7">.496 </text:span><text:span text:style-name="T8">ms</text:span></text:p>
      <text:p text:style-name="P21"><text:span text:style-name="T37"/></text:p>
      <text:p text:style-name="P21"><text:span text:style-name="T37"/></text:p>
      <text:p text:style-name="P19">Configuration du NAT : </text:p>
      <text:p text:style-name="P22"><text:span text:style-name="T36"/></text:p>
      <text:p text:style-name="P19">VLAN 10 : </text:p>
      <text:p text:style-name="P22"><text:span text:style-name="T36"/></text:p>
      <text:p text:style-name="P22"><draw:frame draw:style-name="fr3" draw:name="Image12" text:anchor-type="char" svg:width="17cm" svg:height="10.347cm" draw:z-index="11"><draw:image xlink:href="Pictures/10000000000003530000020600A5D290.png" xlink:type="simple" xlink:show="embed" xlink:actuate="onLoad" draw:mime-type="image/png"/></draw:frame><text:span text:style-name="T36"><text:line-break/>VLAN 20 : </text:span></text:p>
      <text:p text:style-name="P22"><text:span text:style-name="T36"/></text:p>
      <text:p text:style-name="P22"><draw:frame draw:style-name="fr2" draw:name="Image13" text:anchor-type="char" svg:width="17cm" svg:height="9.998cm" draw:z-index="12"><draw:image xlink:href="Pictures/100000000000034D000001F1C694AAF7.png" xlink:type="simple" xlink:show="embed" xlink:actuate="onLoad" draw:mime-type="image/png"/></draw:frame><text:soft-page-break/><text:span text:style-name="T36"><text:line-break/></text:span><text:span text:style-name="T38">Test ping PC1 :</text:span></text:p>
      <text:p text:style-name="P22"><text:span text:style-name="T38"/></text:p>
      <text:p text:style-name="P10"><text:span text:style-name="T6">PC1&gt; ping </text:span><text:span text:style-name="T19">8</text:span><text:span text:style-name="T6">.8.8.8</text:span></text:p>
      <text:p text:style-name="P38"><text:span text:style-name="T38"/></text:p>
      <text:p text:style-name="P10"><text:span text:style-name="T19">84</text:span><text:span text:style-name="T6"> bytes from </text:span><text:span text:style-name="T19">8</text:span><text:span text:style-name="T6">.8.8.8 </text:span><text:span text:style-name="T28">icmp_seq</text:span><text:span text:style-name="T33">=</text:span><text:span text:style-name="T19">1</text:span><text:span text:style-name="T6"> </text:span><text:span text:style-name="T28">ttl</text:span><text:span text:style-name="T33">=</text:span><text:span text:style-name="T19">113</text:span><text:span text:style-name="T6"> </text:span><text:span text:style-name="T28">time</text:span><text:span text:style-name="T33">=</text:span><text:span text:style-name="T19">60</text:span><text:span text:style-name="T6">.199 ms</text:span></text:p>
      <text:p text:style-name="P10"><text:span text:style-name="T19">84</text:span><text:span text:style-name="T6"> bytes from </text:span><text:span text:style-name="T19">8</text:span><text:span text:style-name="T6">.8.8.8 </text:span><text:span text:style-name="T28">icmp_seq</text:span><text:span text:style-name="T33">=</text:span><text:span text:style-name="T19">2</text:span><text:span text:style-name="T6"> </text:span><text:span text:style-name="T28">ttl</text:span><text:span text:style-name="T33">=</text:span><text:span text:style-name="T19">113</text:span><text:span text:style-name="T6"> </text:span><text:span text:style-name="T28">time</text:span><text:span text:style-name="T33">=</text:span><text:span text:style-name="T19">59</text:span><text:span text:style-name="T6">.790 ms</text:span></text:p>
      <text:p text:style-name="P10"><text:span text:style-name="T19">84</text:span><text:span text:style-name="T6"> bytes from </text:span><text:span text:style-name="T19">8</text:span><text:span text:style-name="T6">.8.8.8 </text:span><text:span text:style-name="T28">icmp_seq</text:span><text:span text:style-name="T33">=</text:span><text:span text:style-name="T19">3</text:span><text:span text:style-name="T6"> </text:span><text:span text:style-name="T28">ttl</text:span><text:span text:style-name="T33">=</text:span><text:span text:style-name="T19">113</text:span><text:span text:style-name="T6"> </text:span><text:span text:style-name="T28">time</text:span><text:span text:style-name="T33">=</text:span><text:span text:style-name="T19">60</text:span><text:span text:style-name="T6">.190 ms</text:span></text:p>
      <text:p text:style-name="P10"><text:span text:style-name="T19">84</text:span><text:span text:style-name="T6"> bytes from </text:span><text:span text:style-name="T19">8</text:span><text:span text:style-name="T6">.8.8.8 </text:span><text:span text:style-name="T28">icmp_seq</text:span><text:span text:style-name="T33">=</text:span><text:span text:style-name="T19">4</text:span><text:span text:style-name="T6"> </text:span><text:span text:style-name="T28">ttl</text:span><text:span text:style-name="T33">=</text:span><text:span text:style-name="T19">113</text:span><text:span text:style-name="T6"> </text:span><text:span text:style-name="T28">time</text:span><text:span text:style-name="T33">=</text:span><text:span text:style-name="T19">59</text:span><text:span text:style-name="T6">.142 ms</text:span></text:p>
      <text:p text:style-name="P10"><text:span text:style-name="T19">84</text:span><text:span text:style-name="T6"> bytes from </text:span><text:span text:style-name="T19">8</text:span><text:span text:style-name="T6">.8.8.8 </text:span><text:span text:style-name="T28">icmp_seq</text:span><text:span text:style-name="T33">=</text:span><text:span text:style-name="T19">5</text:span><text:span text:style-name="T6"> </text:span><text:span text:style-name="T28">ttl</text:span><text:span text:style-name="T33">=</text:span><text:span text:style-name="T19">113</text:span><text:span text:style-name="T6"> </text:span><text:span text:style-name="T28">time</text:span><text:span text:style-name="T33">=</text:span><text:span text:style-name="T19">59</text:span><text:span text:style-name="T6">.198 ms</text:span></text:p>
      <text:p text:style-name="P22"><text:span text:style-name="T38"/></text:p>
      <text:p text:style-name="P46">Test ping PC2 :</text:p>
      <text:p text:style-name="P23"><text:span text:style-name="T38"/></text:p>
      <text:p text:style-name="P9"><text:span text:style-name="T6">PC2&gt; ping </text:span><text:span text:style-name="T19">8</text:span><text:span text:style-name="T6">.8.8.8</text:span></text:p>
      <text:p text:style-name="P37"><text:span text:style-name="T38"/></text:p>
      <text:p text:style-name="P18"><text:span text:style-name="T13">bytes from </text:span><text:span text:style-name="T22">8</text:span><text:span text:style-name="T13">.8.8.8 </text:span><text:span text:style-name="T25">icmp_seq</text:span><text:span text:style-name="T34">=</text:span><text:span text:style-name="T22">1</text:span><text:span text:style-name="T13"> </text:span><text:span text:style-name="T25">ttl</text:span><text:span text:style-name="T34">=</text:span><text:span text:style-name="T22">113</text:span><text:span text:style-name="T13"> </text:span><text:span text:style-name="T25">time</text:span><text:span text:style-name="T34">=</text:span><text:span text:style-name="T22">57</text:span><text:span text:style-name="T13">.788 ms</text:span></text:p>
      <text:p text:style-name="P18"><text:span text:style-name="T13">bytes from </text:span><text:span text:style-name="T22">8</text:span><text:span text:style-name="T13">.8.8.8 </text:span><text:span text:style-name="T25">icmp_seq</text:span><text:span text:style-name="T34">=</text:span><text:span text:style-name="T22">2</text:span><text:span text:style-name="T13"> </text:span><text:span text:style-name="T25">ttl</text:span><text:span text:style-name="T34">=</text:span><text:span text:style-name="T22">113</text:span><text:span text:style-name="T13"> </text:span><text:span text:style-name="T25">time</text:span><text:span text:style-name="T34">=</text:span><text:span text:style-name="T22">58</text:span><text:span text:style-name="T13">.723 ms</text:span></text:p>
      <text:p text:style-name="P18"><text:span text:style-name="T13">bytes from </text:span><text:span text:style-name="T22">8</text:span><text:span text:style-name="T13">.8.8.8 </text:span><text:span text:style-name="T25">icmp_seq</text:span><text:span text:style-name="T34">=</text:span><text:span text:style-name="T22">3</text:span><text:span text:style-name="T13"> </text:span><text:span text:style-name="T25">ttl</text:span><text:span text:style-name="T34">=</text:span><text:span text:style-name="T22">113</text:span><text:span text:style-name="T13"> </text:span><text:span text:style-name="T25">time</text:span><text:span text:style-name="T34">=</text:span><text:span text:style-name="T22">58</text:span><text:span text:style-name="T13">.984 ms</text:span></text:p>
      <text:p text:style-name="P18"><text:span text:style-name="T13">bytes from </text:span><text:span text:style-name="T22">8</text:span><text:span text:style-name="T13">.8.8.8 </text:span><text:span text:style-name="T25">icmp_seq</text:span><text:span text:style-name="T34">=</text:span><text:span text:style-name="T22">4</text:span><text:span text:style-name="T13"> </text:span><text:span text:style-name="T25">ttl</text:span><text:span text:style-name="T34">=</text:span><text:span text:style-name="T22">113</text:span><text:span text:style-name="T13"> </text:span><text:span text:style-name="T25">time</text:span><text:span text:style-name="T34">=</text:span><text:span text:style-name="T22">59</text:span><text:span text:style-name="T13">.836 ms</text:span></text:p>
      <text:p text:style-name="P18"><text:span text:style-name="T13">bytes from </text:span><text:span text:style-name="T22">8</text:span><text:span text:style-name="T13">.8.8.8 </text:span><text:span text:style-name="T25">icmp_seq</text:span><text:span text:style-name="T34">=</text:span><text:span text:style-name="T22">5</text:span><text:span text:style-name="T13"> </text:span><text:span text:style-name="T25">ttl</text:span><text:span text:style-name="T34">=</text:span><text:span text:style-name="T22">113</text:span><text:span text:style-name="T13"> </text:span><text:span text:style-name="T25">time</text:span><text:span text:style-name="T34">=</text:span><text:span text:style-name="T22">58</text:span><text:span text:style-name="T13">.003 ms</text:span></text:p>
      <text:p text:style-name="P23"><text:span text:style-name="T38"/></text:p>
      <text:p text:style-name="P25">On fait la même configuration pour ajouter vlan 30 et 40.</text:p>
      <text:p text:style-name="P24"><text:span text:style-name="T42">T</text:span>outes les routes : </text:p>
      <text:p text:style-name="P26"><draw:frame draw:style-name="fr3" draw:name="Image14" text:anchor-type="char" svg:width="17cm" svg:height="3.789cm" draw:z-index="13"><draw:image xlink:href="Pictures/1000000000000350000000BDACD77B53.png" xlink:type="simple" xlink:show="embed" xlink:actuate="onLoad" draw:mime-type="image/png"/></draw:frame>Toutes les configs NAT : </text:p>
      <text:p text:style-name="P26"><draw:frame draw:style-name="fr2" draw:name="Image15" text:anchor-type="char" svg:width="17cm" svg:height="5.72cm" draw:z-index="14"><draw:image xlink:href="Pictures/100000000000034C0000011C74A84D84.png" xlink:type="simple" xlink:show="embed" xlink:actuate="onLoad" draw:mime-type="image/png"/></draw:frame><text:soft-page-break/><text:line-break/><text:span text:style-name="T43">Tableau de test ping a faire. </text:span><text:span text:style-name="T44">(déjà tester tout fonctionne)</text:span></text:p>
      <text:p text:style-name="P26"/>
      <text:p text:style-name="P26">Après avoir validé les premiers tests sur un seul commutateur d’accès, nous avons ajouté un second commutateur de niveau 2 afin de respecter l’architecture minimale demandée dans le cahier des charges. Les postes des VLAN 10 et 20 sont connectés au premier commutateur d’accès, tandis que les postes des VLAN 30 et 40 sont connectés au second commutateur d’accès.</text:p>
      <text:p text:style-name="P26"/>
      <text:p text:style-name="P26">Les deux commutateurs d’accès sont reliés au commutateur de distribution par des liens trunk 802.1Q. Ces trunks permettent de transporter les VLAN 10, 20, 30 et 40 jusqu’au commutateur de distribution. Le routage inter-VLAN est assuré par le commutateur de niveau 3 grâce aux interfaces VLAN configurées comme passerelles.</text:p>
      <text:p text:style-name="P26"/>
      <text:p text:style-name="P26">Les tests de connectivité montrent que les postes peuvent joindre leur passerelle, communiquer entre VLAN, atteindre pfSense et accéder à Internet grâce au NAT configuré sur le pare-feu.</text:p>
      <text:p text:style-name="P26"/>
      <text:p text:style-name="P27">DMZ</text:p>
      <text:p text:style-name="P27"/>
      <text:p text:style-name="P28">On commence par ajouter une interface : </text:p>
      <text:p text:style-name="P28"/>
      <text:p text:style-name="P28"><draw:frame draw:style-name="fr3" draw:name="Image16" text:anchor-type="char" svg:width="17cm" svg:height="3.422cm" draw:z-index="15"><draw:image xlink:href="Pictures/10000000000002FD0000009A8DA7FD13.png" xlink:type="simple" xlink:show="embed" xlink:actuate="onLoad" draw:mime-type="image/png"/></draw:frame><text:soft-page-break/><text:line-break/><text:span text:style-name="T45">Serveur WEB :</text:span><text:line-break/><draw:frame draw:style-name="fr2" draw:name="Image17" text:anchor-type="char" svg:width="17cm" svg:height="16.857cm" draw:z-index="16"><draw:image xlink:href="Pictures/10000000000003460000033F50F14426.png" xlink:type="simple" xlink:show="embed" xlink:actuate="onLoad" draw:mime-type="image/png"/></draw:frame><text:span text:style-name="T45">Installer apache 2</text:span></text:p>
      <text:p text:style-name="P29"><text:soft-page-break/><text:span text:style-name="T45"><text:line-break/></text:span><draw:frame draw:style-name="fr3" draw:name="Image18" text:anchor-type="char" svg:width="17cm" svg:height="2.78cm" draw:z-index="17"><draw:image xlink:href="Pictures/10000000000002880000006A8217FFF1.png" xlink:type="simple" xlink:show="embed" xlink:actuate="onLoad" draw:mime-type="image/png"/></draw:frame><text:span text:style-name="T46">Page de test : <text:line-break/>echo "Serveur Web DMZ - SAE 2.01" | sudo tee /var/www/html/index.html<text:line-break/></text:span><text:span text:style-name="T47">Sur WebTerm en VLAN10 : </text:span><draw:frame draw:style-name="fr1" draw:name="Image19" text:anchor-type="char" svg:x="0.342cm" svg:y="5.489cm" svg:width="13.361cm" svg:height="10.425cm" draw:z-index="18"><draw:image xlink:href="Pictures/10000000000001F90000018A96CFBAFF.png" xlink:type="simple" xlink:show="embed" xlink:actuate="onLoad" draw:mime-type="image/png"/></draw:frame><text:span text:style-name="T47"><text:line-break/><text:line-break/><text:line-break/><text:line-break/></text:span></text:p>
      <text:p text:style-name="P29"><text:span text:style-name="T47"><text:line-break/></text:span><text:soft-page-break/><text:span text:style-name="T47"><text:line-break/><text:line-break/></text:span><text:span text:style-name="T48">Règle pour redirection HTTP vers serveur WEB : <text:line-break/><text:line-break/></text:span><draw:frame draw:style-name="fr1" draw:name="Image20" text:anchor-type="char" svg:x="-0.33cm" svg:y="3.357cm" svg:width="17cm" svg:height="19.773cm" draw:z-index="19"><draw:image xlink:href="Pictures/10000000000002F80000037478D426F9.png" xlink:type="simple" xlink:show="embed" xlink:actuate="onLoad" draw:mime-type="image/png"/></draw:frame><text:span text:style-name="T48"><text:line-break/><text:line-break/></text:span><text:span text:style-name="T49">Depuis une machine hors LAN interne : </text:span></text:p>
      <text:p text:style-name="P29"/>
      <text:p text:style-name="P29"/>
      <text:p text:style-name="P29"/>
      <text:p text:style-name="P48"><draw:frame draw:style-name="fr3" draw:name="Image21" text:anchor-type="char" svg:width="17cm" svg:height="13.095cm" draw:z-index="20"><draw:image xlink:href="Pictures/10000000000002ED00000241141E3CDA.png" xlink:type="simple" xlink:show="embed" xlink:actuate="onLoad" draw:mime-type="image/png"/></draw:frame><text:soft-page-break/><text:line-break/><draw:frame draw:style-name="fr1" draw:name="Image22" text:anchor-type="char" svg:x="-0.048cm" svg:y="13.661cm" svg:width="17cm" svg:height="2.267cm" draw:z-index="21"><draw:image xlink:href="Pictures/100000000000039A0000007B56815137.png" xlink:type="simple" xlink:show="embed" xlink:actuate="onLoad" draw:mime-type="image/png"/></draw:frame></text:p>
      <text:p text:style-name="P48"><text:span text:style-name="T50">Afin de sécuriser la DMZ, nous avons ajouté une règle de filtrage sur l’interface DMZ de pfSense. Cette règle bloque tout trafic initié depuis la DMZ vers les réseaux internes de l’entreprise. Elle est placée en première position afin d’être prioritaire sur les règles d’autorisation.</text:span></text:p>
      <text:p text:style-name="P48"/>
      <text:p text:style-name="P50"><text:span text:style-name="T52">Cette configuration permet de limiter les risques en cas de compromission d’un serveur public. Un attaquant qui prendrait le contrôle du serveur Web en DMZ ne pourrait pas accéder directement aux VLAN internes de l’entreprise. Les tests montrent que le serveur DMZ ne peut plus joindre les postes internes, tandis que l’accès au serveur Web depuis le LAN et depuis l’extérieur reste fonctionnel.</text:span><text:span text:style-name="T16"><text:line-break/></text:span></text:p>
      <text:p text:style-name="P47"><text:span text:style-name="T35">=====</text:span><text:span text:style-name="T14"> Test vers passerelle </text:span><text:span text:style-name="T26">DMZ</text:span><text:span text:style-name="T14"> </text:span><text:span text:style-name="T35">=====</text:span></text:p>
      <text:p text:style-name="P47"><text:span text:style-name="T14">PING </text:span><text:span text:style-name="T23">10</text:span><text:span text:style-name="T14">.1.50.1 </text:span><text:span text:style-name="T35">(</text:span><text:span text:style-name="T23">10</text:span><text:span text:style-name="T14">.1.50.1</text:span><text:span text:style-name="T35">)</text:span><text:span text:style-name="T14"> </text:span><text:span text:style-name="T23">56</text:span><text:span text:style-name="T35">(</text:span><text:span text:style-name="T23">84</text:span><text:span text:style-name="T35">)</text:span><text:span text:style-name="T14"> bytes of data.</text:span></text:p>
      <text:p text:style-name="P47"><text:span text:style-name="T23">64</text:span><text:span text:style-name="T14"> bytes from </text:span><text:span text:style-name="T23">10</text:span><text:span text:style-name="T14">.1.50.1: </text:span><text:span text:style-name="T26">icmp_seq</text:span><text:span text:style-name="T35">=</text:span><text:span text:style-name="T23">1</text:span><text:span text:style-name="T14"> </text:span><text:span text:style-name="T26">ttl</text:span><text:span text:style-name="T35">=</text:span><text:span text:style-name="T23">64</text:span><text:span text:style-name="T14"> </text:span><text:span text:style-name="T26">time</text:span><text:span text:style-name="T35">=</text:span><text:span text:style-name="T23">3</text:span><text:span text:style-name="T14">.50 ms</text:span></text:p>
      <text:p text:style-name="P47"><text:span text:style-name="T23">64</text:span><text:span text:style-name="T14"> bytes from </text:span><text:span text:style-name="T23">10</text:span><text:span text:style-name="T14">.1.50.1: </text:span><text:span text:style-name="T26">icmp_seq</text:span><text:span text:style-name="T35">=</text:span><text:span text:style-name="T23">2</text:span><text:span text:style-name="T14"> </text:span><text:span text:style-name="T26">ttl</text:span><text:span text:style-name="T35">=</text:span><text:span text:style-name="T23">64</text:span><text:span text:style-name="T14"> </text:span><text:span text:style-name="T26">time</text:span><text:span text:style-name="T35">=</text:span><text:span text:style-name="T23">2</text:span><text:span text:style-name="T14">.43 ms</text:span></text:p>
      <text:p text:style-name="P47"><text:span text:style-name="T23">64</text:span><text:span text:style-name="T14"> bytes from </text:span><text:span text:style-name="T23">10</text:span><text:span text:style-name="T14">.1.50.1: </text:span><text:span text:style-name="T26">icmp_seq</text:span><text:span text:style-name="T35">=</text:span><text:span text:style-name="T23">3</text:span><text:span text:style-name="T14"> </text:span><text:span text:style-name="T26">ttl</text:span><text:span text:style-name="T35">=</text:span><text:span text:style-name="T23">64</text:span><text:span text:style-name="T14"> </text:span><text:span text:style-name="T26">time</text:span><text:span text:style-name="T35">=</text:span><text:span text:style-name="T23">3</text:span><text:span text:style-name="T14">.28 ms</text:span></text:p>
      <text:p text:style-name="P47"><text:span text:style-name="T23">64</text:span><text:span text:style-name="T14"> bytes from </text:span><text:span text:style-name="T23">10</text:span><text:span text:style-name="T14">.1.50.1: </text:span><text:span text:style-name="T26">icmp_seq</text:span><text:span text:style-name="T35">=</text:span><text:span text:style-name="T23">4</text:span><text:span text:style-name="T14"> </text:span><text:span text:style-name="T26">ttl</text:span><text:span text:style-name="T35">=</text:span><text:span text:style-name="T23">64</text:span><text:span text:style-name="T14"> </text:span><text:span text:style-name="T26">time</text:span><text:span text:style-name="T35">=</text:span><text:span text:style-name="T23">3</text:span><text:span text:style-name="T14">.32 ms</text:span></text:p>
      <text:p text:style-name="P49"/>
      <text:p text:style-name="P47"><text:span text:style-name="T14">--- </text:span><text:span text:style-name="T23">10</text:span><text:span text:style-name="T14">.1.50.1 ping statistics ---</text:span></text:p>
      <text:p text:style-name="P47"><text:span text:style-name="T23">4</text:span><text:span text:style-name="T14"> packets transmitted, </text:span><text:span text:style-name="T23">4</text:span><text:span text:style-name="T14"> received, </text:span><text:span text:style-name="T23">0</text:span><text:span text:style-name="T14">% packet loss, </text:span><text:span text:style-name="T26">time</text:span><text:span text:style-name="T14"> 3005ms</text:span></text:p>
      <text:p text:style-name="P47"><text:span text:style-name="T14">rtt min/avg/max/mdev </text:span><text:span text:style-name="T35">=</text:span><text:span text:style-name="T14"> </text:span><text:span text:style-name="T23">2</text:span><text:span text:style-name="T14">.434/3.134/3.500/0.412 </text:span><text:span text:style-name="T26">ms</text:span></text:p>
      <text:p text:style-name="P47"><text:soft-page-break/><text:span text:style-name="T35">=====</text:span><text:span text:style-name="T14"> Test vers PC interne VLAN </text:span><text:span text:style-name="T26">10</text:span><text:span text:style-name="T14"> </text:span><text:span text:style-name="T35">=====</text:span></text:p>
      <text:p text:style-name="P47"><text:span text:style-name="T14">PING </text:span><text:span text:style-name="T23">10</text:span><text:span text:style-name="T14">.1.10.11 </text:span><text:span text:style-name="T35">(</text:span><text:span text:style-name="T23">10</text:span><text:span text:style-name="T14">.1.10.11</text:span><text:span text:style-name="T35">)</text:span><text:span text:style-name="T14"> </text:span><text:span text:style-name="T23">56</text:span><text:span text:style-name="T35">(</text:span><text:span text:style-name="T23">84</text:span><text:span text:style-name="T35">)</text:span><text:span text:style-name="T14"> bytes of data.</text:span></text:p>
      <text:p text:style-name="P49"/>
      <text:p text:style-name="P47"><text:span text:style-name="T14">--- </text:span><text:span text:style-name="T23">10</text:span><text:span text:style-name="T14">.1.10.11 ping statistics ---</text:span></text:p>
      <text:p text:style-name="P47"><text:span text:style-name="T23">4</text:span><text:span text:style-name="T14"> packets transmitted, </text:span><text:span text:style-name="T23">0</text:span><text:span text:style-name="T14"> received, </text:span><text:span text:style-name="T23">100</text:span><text:span text:style-name="T14">% packet loss, </text:span><text:span text:style-name="T26">time</text:span><text:span text:style-name="T14"> </text:span><text:span text:style-name="T26">3071ms</text:span></text:p>
      <text:p text:style-name="P49"/>
      <text:p text:style-name="P47"><text:span text:style-name="T35">=====</text:span><text:span text:style-name="T14"> Test vers PC interne VLAN </text:span><text:span text:style-name="T26">20</text:span><text:span text:style-name="T14"> </text:span><text:span text:style-name="T35">=====</text:span></text:p>
      <text:p text:style-name="P47"><text:span text:style-name="T14">PING </text:span><text:span text:style-name="T23">10</text:span><text:span text:style-name="T14">.1.20.11 </text:span><text:span text:style-name="T35">(</text:span><text:span text:style-name="T23">10</text:span><text:span text:style-name="T14">.1.20.11</text:span><text:span text:style-name="T35">)</text:span><text:span text:style-name="T14"> </text:span><text:span text:style-name="T23">56</text:span><text:span text:style-name="T35">(</text:span><text:span text:style-name="T23">84</text:span><text:span text:style-name="T35">)</text:span><text:span text:style-name="T14"> bytes of data.</text:span></text:p>
      <text:p text:style-name="P49"/>
      <text:p text:style-name="P47"><text:span text:style-name="T14">--- </text:span><text:span text:style-name="T23">10</text:span><text:span text:style-name="T14">.1.20.11 ping statistics ---</text:span></text:p>
      <text:p text:style-name="P47"><text:span text:style-name="T23">4</text:span><text:span text:style-name="T14"> packets transmitted, </text:span><text:span text:style-name="T23">0</text:span><text:span text:style-name="T14"> received, </text:span><text:span text:style-name="T23">100</text:span><text:span text:style-name="T14">% packet loss, </text:span><text:span text:style-name="T26">time</text:span><text:span text:style-name="T14"> </text:span><text:span text:style-name="T26">3049ms</text:span></text:p>
      <text:p text:style-name="P49"/>
      <text:p text:style-name="P47"><text:span text:style-name="T35">=====</text:span><text:span text:style-name="T14"> Test </text:span><text:span text:style-name="T26">Internet</text:span><text:span text:style-name="T14"> </text:span><text:span text:style-name="T35">=====</text:span></text:p>
      <text:p text:style-name="P47"><text:span text:style-name="T14">PING </text:span><text:span text:style-name="T23">8</text:span><text:span text:style-name="T14">.8.8.8 </text:span><text:span text:style-name="T35">(</text:span><text:span text:style-name="T23">8</text:span><text:span text:style-name="T14">.8.8.8</text:span><text:span text:style-name="T35">)</text:span><text:span text:style-name="T14"> </text:span><text:span text:style-name="T23">56</text:span><text:span text:style-name="T35">(</text:span><text:span text:style-name="T23">84</text:span><text:span text:style-name="T35">)</text:span><text:span text:style-name="T14"> bytes of data.</text:span></text:p>
      <text:p text:style-name="P47"><text:span text:style-name="T23">64</text:span><text:span text:style-name="T14"> bytes from </text:span><text:span text:style-name="T23">8</text:span><text:span text:style-name="T14">.8.8.8: </text:span><text:span text:style-name="T26">icmp_seq</text:span><text:span text:style-name="T35">=</text:span><text:span text:style-name="T23">1</text:span><text:span text:style-name="T14"> </text:span><text:span text:style-name="T26">ttl</text:span><text:span text:style-name="T35">=</text:span><text:span text:style-name="T23">116</text:span><text:span text:style-name="T14"> </text:span><text:span text:style-name="T26">time</text:span><text:span text:style-name="T35">=</text:span><text:span text:style-name="T23">55</text:span><text:span text:style-name="T14">.5 ms</text:span></text:p>
      <text:p text:style-name="P47"><text:span text:style-name="T23">64</text:span><text:span text:style-name="T14"> bytes from </text:span><text:span text:style-name="T23">8</text:span><text:span text:style-name="T14">.8.8.8: </text:span><text:span text:style-name="T26">icmp_seq</text:span><text:span text:style-name="T35">=</text:span><text:span text:style-name="T23">2</text:span><text:span text:style-name="T14"> </text:span><text:span text:style-name="T26">ttl</text:span><text:span text:style-name="T35">=</text:span><text:span text:style-name="T23">116</text:span><text:span text:style-name="T14"> </text:span><text:span text:style-name="T26">time</text:span><text:span text:style-name="T35">=</text:span><text:span text:style-name="T23">62</text:span><text:span text:style-name="T14">.3 ms</text:span></text:p>
      <text:p text:style-name="P47"><text:span text:style-name="T23">64</text:span><text:span text:style-name="T14"> bytes from </text:span><text:span text:style-name="T23">8</text:span><text:span text:style-name="T14">.8.8.8: </text:span><text:span text:style-name="T26">icmp_seq</text:span><text:span text:style-name="T35">=</text:span><text:span text:style-name="T23">3</text:span><text:span text:style-name="T14"> </text:span><text:span text:style-name="T26">ttl</text:span><text:span text:style-name="T35">=</text:span><text:span text:style-name="T23">116</text:span><text:span text:style-name="T14"> </text:span><text:span text:style-name="T26">time</text:span><text:span text:style-name="T35">=</text:span><text:span text:style-name="T23">53</text:span><text:span text:style-name="T14">.9 ms</text:span></text:p>
      <text:p text:style-name="P47"><text:span text:style-name="T23">64</text:span><text:span text:style-name="T14"> bytes from </text:span><text:span text:style-name="T23">8</text:span><text:span text:style-name="T14">.8.8.8: </text:span><text:span text:style-name="T26">icmp_seq</text:span><text:span text:style-name="T35">=</text:span><text:span text:style-name="T23">4</text:span><text:span text:style-name="T14"> </text:span><text:span text:style-name="T26">ttl</text:span><text:span text:style-name="T35">=</text:span><text:span text:style-name="T23">116</text:span><text:span text:style-name="T14"> </text:span><text:span text:style-name="T26">time</text:span><text:span text:style-name="T35">=</text:span><text:span text:style-name="T23">59</text:span><text:span text:style-name="T14">.3 ms</text:span></text:p>
      <text:p text:style-name="P49"/>
      <text:p text:style-name="P47"><text:span text:style-name="T14">--- </text:span><text:span text:style-name="T23">8</text:span><text:span text:style-name="T14">.8.8.8 ping statistics ---</text:span></text:p>
      <text:p text:style-name="P47"><text:span text:style-name="T23">4</text:span><text:span text:style-name="T14"> packets transmitted, </text:span><text:span text:style-name="T23">4</text:span><text:span text:style-name="T14"> received, </text:span><text:span text:style-name="T23">0</text:span><text:span text:style-name="T14">% packet loss, </text:span><text:span text:style-name="T26">time</text:span><text:span text:style-name="T14"> 3005ms</text:span></text:p>
      <text:p text:style-name="P55"><text:span text:style-name="T9">rtt min/avg/max/mdev </text:span><text:span text:style-name="T32">=</text:span><text:span text:style-name="T9"> </text:span><text:span text:style-name="T21">53</text:span><text:span text:style-name="T9">.918/57.768/62.341/3.275 ms</text:span></text:p>
      <text:p text:style-name="P54"><text:span text:style-name="T15"><text:line-break/><text:line-break/></text:span><text:span text:style-name="T53">Serveur FTP</text:span></text:p>
      <text:p text:style-name="P54"><text:span text:style-name="T53"/></text:p>
      <text:p text:style-name="P56"><text:span text:style-name="T51">Installer FTP</text:span></text:p>
      <text:p text:style-name="P51"><text:span text:style-name="T51">apt update</text:span></text:p>
      <text:p text:style-name="P51"><text:span text:style-name="T51">apt install -y </text:span><text:span text:style-name="T54">proftpd</text:span></text:p>
      <text:p text:style-name="P51"><draw:frame draw:style-name="fr1" draw:name="Image23" text:anchor-type="char" svg:x="-0.198cm" svg:y="0.33cm" svg:width="17cm" svg:height="3.043cm" draw:z-index="22"><draw:image xlink:href="Pictures/100000000000028800000074932F1621.png" xlink:type="simple" xlink:show="embed" xlink:actuate="onLoad" draw:mime-type="image/png"/></draw:frame><text:span text:style-name="T51"/></text:p>
      <text:p text:style-name="P56"><text:span text:style-name="T51">Créer utilisateur FTP<text:line-break/><text:line-break/></text:span><text:span text:style-name="T56">useradd ftpuser</text:span></text:p>
      <text:p text:style-name="P57"><text:span text:style-name="T55">passwd ftpuser</text:span></text:p>
      <text:p text:style-name="P57"><text:span text:style-name="T55"/></text:p>
      <text:p text:style-name="P57"><text:span text:style-name="T55">echo "===== Création dossier FTP ====="</text:span></text:p>
      <text:p text:style-name="P57"><text:span text:style-name="T55">sudo mkdir -p /home/ftpuser/ftp</text:span></text:p>
      <text:p text:style-name="P57"><text:span text:style-name="T55"/></text:p>
      <text:p text:style-name="P57"><text:span text:style-name="T55">echo "===== Création fichier test ====="</text:span></text:p>
      <text:p text:style-name="P57"><text:span text:style-name="T55">echo "Fichier test FTP - SAE 2.01" | sudo tee /home/ftpuser/ftp/test.txt</text:span></text:p>
      <text:p text:style-name="P57"><text:span text:style-name="T55"/></text:p>
      <text:p text:style-name="P57"><text:span text:style-name="T55">echo "===== Droits utilisateur ====="</text:span></text:p>
      <text:p text:style-name="P57"><text:span text:style-name="T55">sudo chown -R ftpuser:ftpuser /home/ftpuser/ftp</text:span></text:p>
      <text:p text:style-name="P57"><text:span text:style-name="T55"/></text:p>
      <text:p text:style-name="P58"><text:span text:style-name="T51">Configuration ProFTPD</text:span></text:p>
      <text:p text:style-name="P58"><text:span text:style-name="T51"/></text:p>
      <text:p text:style-name="P59"><text:span text:style-name="T51">Règle nat pour ftp : </text:span></text:p>
      <text:p text:style-name="P59"><text:span text:style-name="T51"/></text:p>
      <text:p text:style-name="P59"><draw:frame draw:style-name="fr2" draw:name="Image24" text:anchor-type="char" svg:width="17cm" svg:height="13.437cm" draw:z-index="23"><draw:image xlink:href="Pictures/100000000000039E000002DCF5F67489.png" xlink:type="simple" xlink:show="embed" xlink:actuate="onLoad" draw:mime-type="image/png"/></draw:frame><text:soft-page-break/><text:span text:style-name="T51"><text:line-break/>Passif : </text:span></text:p>
      <text:p text:style-name="P59"><draw:frame draw:style-name="fr2" draw:name="Image25" text:anchor-type="char" svg:width="17cm" svg:height="19.523cm" draw:z-index="24"><draw:image xlink:href="Pictures/1000000000000300000003727C742EB7.png" xlink:type="simple" xlink:show="embed" xlink:actuate="onLoad" draw:mime-type="image/png"/></draw:frame><text:soft-page-break/><text:span text:style-name="T51"><text:line-break/></text:span><text:span text:style-name="T59">test ftp WAN </text:span><draw:frame draw:style-name="fr1" draw:name="Image26" text:anchor-type="char" svg:x="0.54cm" svg:y="27.548cm" svg:width="15.603cm" svg:height="9.902cm" draw:z-index="25"><draw:image xlink:href="Pictures/10000000000003820000023A98273F19.png" xlink:type="simple" xlink:show="embed" xlink:actuate="onLoad" draw:mime-type="image/png"/></draw:frame><text:span text:style-name="T59"><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57">Le serveur FTP a été placé dans la DMZ avec l’adresse IP 10.1.50.20/24 et la passerelle 10.1.50.1. Le service ProFTPD a été installé afin de permettre le transfert de fichiers via le protocole FTP.</text:span></text:p>
      <text:p text:style-name="P59"><text:span text:style-name="T57"/></text:p>
      <text:p text:style-name="P59"><text:span text:style-name="T57">Un utilisateur dédié, ftpuser, a été créé pour tester l’accès au serveur. Un fichier de test a été placé dans le répertoire FTP de cet utilisateur afin de vérifier la liste des fichiers et le téléchargement.</text:span></text:p>
      <text:p text:style-name="P59"><text:span text:style-name="T57"/></text:p>
      <text:p text:style-name="P59"><text:span text:style-name="T57">Le service FTP a d’abord été testé depuis le réseau interne, puis depuis l’extérieur via l’adresse WAN de pfSense. Des règles de redirection NAT ont été configurées sur pfSense pour rediriger le port 21 ainsi que les ports passifs 30000 à 30010 vers le serveur FTP de la DMZ.</text:span></text:p>
      <text:p text:style-name="P59"><text:span text:style-name="T57"/></text:p>
      <text:p text:style-name="P59"><text:span text:style-name="T57">Les tests montrent que le serveur FTP est accessible depuis l’extérieur tout en restant isolé dans la DMZ.<text:line-break/></text:span><text:soft-page-break/><text:span text:style-name="T57"><text:line-break/></text:span><text:span text:style-name="T60">DHCP<text:line-break/><text:line-break/></text:span><text:span text:style-name="T61">VLAN serveur interne : </text:span></text:p>
      <text:p text:style-name="P60"><text:span text:style-name="T61">S</text:span><text:span text:style-name="T51">UR Switch L3</text:span></text:p>
      <text:p text:style-name="P52"><text:span text:style-name="T61">enable</text:span></text:p>
      <text:p text:style-name="P52"><text:span text:style-name="T61">configure terminal</text:span></text:p>
      <text:p text:style-name="P52"><text:span text:style-name="T61"/></text:p>
      <text:p text:style-name="P52"><text:span text:style-name="T61">vlan 60</text:span></text:p>
      <text:p text:style-name="P52"><text:span text:style-name="T61"><text:s/>name SERVEURS_INTERNES</text:span></text:p>
      <text:p text:style-name="P52"><text:span text:style-name="T61">exit</text:span></text:p>
      <text:p text:style-name="P52"><text:span text:style-name="T61"/></text:p>
      <text:p text:style-name="P52"><text:span text:style-name="T61">interface vlan 60</text:span></text:p>
      <text:p text:style-name="P52"><text:span text:style-name="T61"><text:s/>description PASSERELLE_SERVEURS_INTERNES</text:span></text:p>
      <text:p text:style-name="P52"><text:span text:style-name="T61"><text:s/>ip address 10.1.60.1 255.255.255.0</text:span></text:p>
      <text:p text:style-name="P52"><text:span text:style-name="T61"><text:s/>no shutdown</text:span></text:p>
      <text:p text:style-name="P52"><text:span text:style-name="T61">exit</text:span></text:p>
      <text:p text:style-name="P52"><text:span text:style-name="T61"/></text:p>
      <text:p text:style-name="P52"><text:span text:style-name="T61">interface gi0/3<text:line-break/>description SRV-DHCP_VLAN60<text:line-break/>switchport mode access<text:line-break/>switchport access vlan 60<text:line-break/>no shutdown<text:line-break/>exit</text:span></text:p>
      <text:p text:style-name="P52"><text:span text:style-name="T61"/></text:p>
      <text:p text:style-name="P52"><text:span text:style-name="T61">end</text:span></text:p>
      <text:p text:style-name="P52"><text:span text:style-name="T61">write memory</text:span></text:p>
      <text:p text:style-name="P52"><text:span text:style-name="T61"/></text:p>
      <text:p text:style-name="P61"><text:span text:style-name="T51">Règles pare feu pour VLAN60 ect…</text:span></text:p>
      <text:p text:style-name="P61"><text:span text:style-name="T51"/></text:p>
      <text:p text:style-name="P53"><text:span text:style-name="T51">Installer kea</text:span></text:p>
      <text:p text:style-name="P53"><text:span text:style-name="T51">apt install -y kea-dhcp4-server</text:span></text:p>
      <text:p text:style-name="P61"><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8T15:56:53.822933239</meta:creation-date>
    <dc:date>2026-05-29T11:34:16.865682766</dc:date>
    <meta:editing-duration>PT6H45M1S</meta:editing-duration>
    <meta:editing-cycles>37</meta:editing-cycles>
    <meta:generator>LibreOffice/24.2.7.2$Linux_X86_64 LibreOffice_project/420$Build-2</meta:generator>
    <meta:document-statistic meta:table-count="4" meta:image-count="26" meta:object-count="0" meta:page-count="19" meta:paragraph-count="338" meta:word-count="1630" meta:character-count="10813" meta:non-whitespace-character-count="9354"/>
  </office:meta>
</office:document-meta>
</file>